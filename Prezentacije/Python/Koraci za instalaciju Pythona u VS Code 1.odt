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2" style:parent-style-name="Strong" style:family="text">
      <style:text-properties fo:font-size="14pt" style:font-size-asian="14pt" style:font-size-complex="14pt"/>
    </style:style>
    <style:style style:name="T3" style:parent-style-name="Strong" style:family="text">
      <style:text-properties fo:font-size="14pt" style:font-size-asian="14pt" style:font-size-complex="14pt"/>
    </style:style>
    <style:style style:name="T4" style:parent-style-name="Strong" style:family="text">
      <style:text-properties fo:font-size="14pt" style:font-size-asian="14pt" style:font-size-complex="14pt"/>
    </style:style>
    <style:style style:name="P5" style:parent-style-name="NormalWeb" style:list-style-name="LFO1" style:family="paragraph"/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Hyperlink" style:family="text">
      <style:text-properties fo:font-size="14pt" style:font-size-asian="14pt" style:font-size-complex="14pt"/>
    </style:style>
    <style:style style:name="T10" style:parent-style-name="Hyperlink" style:family="text">
      <style:text-properties fo:font-size="14pt" style:font-size-asian="14pt" style:font-size-complex="14pt"/>
    </style:style>
    <style:style style:name="T11" style:parent-style-name="Hyperlink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NormalWeb" style:list-style-name="LFO1" style:family="paragraph"/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Emphasis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Strong" style:family="text">
      <style:text-properties fo:font-size="14pt" style:font-size-asian="14pt" style:font-size-complex="14pt"/>
    </style:style>
    <style:style style:name="T25" style:parent-style-name="Strong" style:family="text">
      <style:text-properties fo:font-size="14pt" style:font-size-asian="14pt" style:font-size-complex="14pt"/>
    </style:style>
    <style:style style:name="T26" style:parent-style-name="Strong" style:family="text">
      <style:text-properties fo:font-size="14pt" style:font-size-asian="14pt" style:font-size-complex="14pt"/>
    </style:style>
    <style:style style:name="P27" style:parent-style-name="NormalWeb" style:list-style-name="LFO2" style:family="paragraph">
      <style:text-properties fo:font-size="14pt" style:font-size-asian="14pt" style:font-size-complex="14pt"/>
    </style:style>
    <style:style style:name="P28" style:parent-style-name="NormalWeb" style:list-style-name="LFO2" style:family="paragraph">
      <style:text-properties fo:font-size="14pt" style:font-size-asian="14pt" style:font-size-complex="14pt"/>
    </style:style>
    <style:style style:name="P29" style:parent-style-name="NormalWeb" style:list-style-name="LFO2" style:family="paragraph">
      <style:text-properties fo:font-size="14pt" style:font-size-asian="14pt" style:font-size-complex="14pt"/>
    </style:style>
    <style:style style:name="P30" style:parent-style-name="NormalWeb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Web" style:list-style-name="LFO3" style:family="paragraph">
      <style:text-properties fo:font-size="14pt" style:font-size-asian="14pt" style:font-size-complex="14pt"/>
    </style:style>
    <style:style style:name="P32" style:parent-style-name="NormalWeb" style:list-style-name="LFO3" style:family="paragraph"/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P38" style:parent-style-name="NormalWeb" style:list-style-name="LFO3" style:family="paragraph"/>
    <style:style style:name="T39" style:parent-style-name="DefaultParagraphFont" style:family="text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P46" style:parent-style-name="NormalWeb" style:family="paragraph">
      <style:paragraph-properties fo:text-indent="0.25in"/>
    </style:style>
    <style:style style:name="P47" style:parent-style-name="NormalWeb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NormalWeb" style:list-style-name="LFO4" style:family="paragraph">
      <style:text-properties fo:font-size="14pt" style:font-size-asian="14pt" style:font-size-complex="14pt"/>
    </style:style>
    <style:style style:name="P49" style:parent-style-name="NormalWeb" style:list-style-name="LFO4" style:family="paragraph"/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P57" style:parent-style-name="NormalWeb" style:list-style-name="LFO4" style:family="paragraph">
      <style:text-properties fo:font-size="14pt" style:font-size-asian="14pt" style:font-size-complex="14pt"/>
    </style:style>
    <style:style style:name="P58" style:parent-style-name="Normal" style:family="paragraph">
      <style:paragraph-properties fo:line-height="100%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sr" style:country-asian="RS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NormalWeb" style:list-style-name="LFO4" style:family="paragraph">
      <style:text-properties fo:font-size="14pt" style:font-size-asian="14pt" style:font-size-complex="14pt"/>
    </style:style>
    <style:style style:name="P63" style:parent-style-name="NormalWeb" style:list-style-name="LFO4" style:family="paragraph">
      <style:text-properties fo:font-size="14pt" style:font-size-asian="14pt" style:font-size-complex="14pt"/>
    </style:style>
    <style:style style:name="P64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family="paragraph">
      <style:paragraph-properties fo:text-indent="0.25in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Normal" style:family="paragraph">
      <style:paragraph-properties fo:text-indent="0.25in"/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paragraph-properties fo:text-indent="0.2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NormalWeb" style:list-style-name="LFO4" style:family="paragraph">
      <style:text-properties fo:font-size="14pt" style:font-size-asian="14pt" style:font-size-complex="14pt"/>
    </style:style>
    <style:style style:name="P70" style:parent-style-name="NormalWeb" style:list-style-name="LFO4" style:family="paragraph">
      <style:text-properties fo:font-size="14pt" style:font-size-asian="14pt" style:font-size-complex="14pt"/>
    </style:style>
    <style:style style:name="P71" style:parent-style-name="NormalWeb" style:list-style-name="LFO4" style:family="paragraph">
      <style:text-properties fo:font-size="14pt" style:font-size-asian="14pt" style:font-size-complex="14pt"/>
    </style:style>
    <style:style style:name="P72" style:parent-style-name="NormalWeb" style:list-style-name="LFO4" style:family="paragraph">
      <style:text-properties fo:font-size="14pt" style:font-size-asian="14pt" style:font-size-complex="14pt"/>
    </style:style>
    <style:style style:name="P73" style:parent-style-name="Normal" style:family="paragraph">
      <style:paragraph-properties fo:text-indent="0.2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6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Koraci za instalaciju Pythona u VS Code</text:p>
      <text:p text:style-name="NormalWeb"><text:span text:style-name="T2">1.Instaliraj</text:span><text:span text:style-name="T3">te</text:span><text:span text:style-name="T4"><text:s/>Python</text:span></text:p>
      <text:list text:style-name="LFO1" text:continue-numbering="true">
        <text:list-item>
          <text:p text:style-name="P5"><text:span text:style-name="T6">Preuzmi</text:span><text:span text:style-name="T7">te</text:span><text:span text:style-name="T8"><text:s/>Python sa zvaničnog sajta:<text:s/></text:span><text:a xlink:href="https://www.python.org/downloads/" office:target-frame-name="_top" xlink:show="replace"><text:span text:style-name="T9">pyt</text:span><text:bookmark-start text:name="_Hlt235105599"/><text:bookmark-start text:name="_Hlt235105600"/><text:span text:style-name="T10">h</text:span><text:bookmark-end text:name="_Hlt235105599"/><text:bookmark-end text:name="_Hlt235105600"/><text:span text:style-name="T11">on.org</text:span></text:a><text:span text:style-name="T12"><text:s/>(3.10.</text:span><text:span text:style-name="T13">0</text:span><text:span text:style-name="T14"><text:s/>verzija)</text:span></text:p>
        </text:list-item>
        <text:list-item>
          <text:p text:style-name="P15"><text:span text:style-name="T16">Instaliraj</text:span><text:span text:style-name="T17">te</text:span><text:span text:style-name="T18"><text:s/>ga na računar (obavezno označi</text:span><text:span text:style-name="T19">te</text:span><text:span text:style-name="T20"><text:s/>opciju<text:s/></text:span><text:span text:style-name="T21">Add Python to PATH</text:span><text:span text:style-name="T22"><text:s/>tokom instalacije).</text:span></text:p>
        </text:list-item>
      </text:list>
      <text:p text:style-name="NormalWeb"><text:span text:style-name="T23">2.</text:span><text:span text:style-name="T24"><text:s/>Provjeri</text:span><text:span text:style-name="T25">te</text:span><text:span text:style-name="T26"><text:s/>instalaciju</text:span></text:p>
      <text:list text:style-name="LFO2" text:continue-numbering="true">
        <text:list-item>
          <text:p text:style-name="P27">Otvorite<text:s/>terminal (Command Prompt ili PowerShell).</text:p>
        </text:list-item>
        <text:list-item>
          <text:p text:style-name="P28">Ukucajte: python –version</text:p>
        </text:list-item>
        <text:list-item>
          <text:p text:style-name="P29">Ako vidite<text:s/>verziju (Python 3.10.0), instalacija je uspješna.</text:p>
        </text:list-item>
      </text:list>
      <text:p text:style-name="P30">3. Instalirajte<text:s/>Python ekstenziju u VS Code</text:p>
      <text:list text:style-name="LFO3" text:continue-numbering="true">
        <text:list-item>
          <text:p text:style-name="P31">Otvorite<text:s/>VS Code.</text:p>
        </text:list-item>
        <text:list-item>
          <text:p text:style-name="P32"><text:span text:style-name="T33">Idi</text:span><text:span text:style-name="T34">te</text:span><text:span text:style-name="T35"><text:s/>na<text:s/></text:span><text:span text:style-name="T36">Extensions</text:span><text:span text:style-name="T37"><text:s/>(ikonica kvadrata sa četiri tačke sa strane).</text:span></text:p>
        </text:list-item>
        <text:list-item>
          <text:p text:style-name="P38"><text:span text:style-name="T39">Pretraži</text:span><text:span text:style-name="T40">te</text:span><text:span text:style-name="T41"><text:s/></text:span><text:span text:style-name="T42">Python</text:span><text:span text:style-name="T43"><text:s/>i instaliraj</text:span><text:span text:style-name="T44">te</text:span><text:span text:style-name="T45"><text:s/>ekstenziju koju je napravio Microsoft.</text:span></text:p>
        </text:list-item>
      </text:list>
      <text:p text:style-name="P46"><draw:custom-shape svg:x="0.69167in" svg:y="1.31875in" svg:width="2.69167in" svg:height="0.71667in" draw:z-index="251660288" draw:id="id0" draw:style-name="a0" draw:name="Rectangle 3" text:anchor-type="paragraph"><svg:title/><svg:desc/><draw:enhanced-geometry draw:type="non-primitive" svg:viewBox="0 0 21600 21600" draw:enhanced-path="M 0 0 L 21600 0 21600 21600 0 21600 Z N"/></draw:custom-shape><draw:custom-shape svg:x="0.14167in" svg:y="2.18542in" svg:width="0.48333in" svg:height="0.5in" draw:z-index="251659264" draw:id="id1" draw:style-name="a1" draw:name="Oval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2" draw:name="Picture 1" text:anchor-type="as-char" svg:x="0in" svg:y="0in" svg:width="3.2512in" svg:height="3.50532in" style:rel-width="scale" style:rel-height="scale"><draw:image xlink:href="media/image1.png" xlink:type="simple" xlink:show="embed" xlink:actuate="onLoad"/><svg:title/><svg:desc/></draw:frame></text:p>
      <text:p text:style-name="P47">4. Podesite<text:s/>interpreter</text:p>
      <text:list text:style-name="LFO4" text:continue-numbering="true">
        <text:list-item>
          <text:p text:style-name="P48">Otvorite<text:s/>bilo koji .py fajl u VS Code.</text:p>
        </text:list-item>
        <text:list-item>
          <text:p text:style-name="P49"><text:span text:style-name="T50">Klikni</text:span><text:span text:style-name="T51">te</text:span><text:span text:style-name="T52"><text:s/>na donji desni ugao gdje piše<text:s/></text:span><text:span text:style-name="T53">“Select Interpreter”.</text:span><text:span text:style-name="T54"><text:s/></text:span><text:span text:style-name="T55">Ukoliko ne vidite dato polje,<text:s/></text:span><text:span text:style-name="T56">jednim desnim klikom na status baru pojavit će se meni. Štiklirajte Python interpreter.</text:span></text:p>
        </text:list-item>
        <text:list-item>
          <text:p text:style-name="P57">Izaberite<text:s/>verziju Pythona koju ste instalirali.</text:p>
        </text:list-item>
      </text:list>
      <text:p text:style-name="NormalWeb"/>
      <text:p text:style-name="NormalWeb"><draw:custom-shape svg:x="3.75833in" svg:y="0.75833in" svg:width="1.01667in" svg:height="0.5in" draw:z-index="251662336" draw:id="id2" draw:style-name="a3" draw:name="Oval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4" draw:name="Picture 4" text:anchor-type="as-char" svg:x="0in" svg:y="0in" svg:width="4.86923in" svg:height="1.2005in" style:rel-width="scale" style:rel-height="scale"><draw:image xlink:href="media/image2.png" xlink:type="simple" xlink:show="embed" xlink:actuate="onLoad"/><svg:title/><svg:desc/></draw:frame></text:p>
      <text:p text:style-name="NormalWeb"><draw:frame draw:style-name="a5" draw:name="Picture 5" text:anchor-type="as-char" svg:x="0in" svg:y="0in" svg:width="6.26806in" svg:height="1.98125in" style:rel-width="scale" style:rel-height="scale"><draw:image xlink:href="media/image3.png" xlink:type="simple" xlink:show="embed" xlink:actuate="onLoad"/><svg:title/><svg:desc/></draw:frame></text:p>
      <text:p text:style-name="P58"><text:span text:style-name="T59">5.</text:span><text:span text:style-name="T60"><text:s/></text:span><text:span text:style-name="T61">Testiraj pokretanje koda</text:span></text:p>
      <text:list text:style-name="LFO4" text:continue-numbering="true">
        <text:list-item>
          <text:p text:style-name="P62">Napravite fajl hello.py sa sadržajem: print("Hello, VS Code!")</text:p>
        </text:list-item>
        <text:list-item>
          <text:p text:style-name="P63">Pokrenite ga u VS Code terminalu komandom: python hello.py</text:p>
        </text:list-item>
      </text:list>
      <text:p text:style-name="P64"/>
      <text:p text:style-name="P65"><draw:custom-shape svg:x="3.225in" svg:y="0.57431in" svg:width="0.48333in" svg:height="0.5in" draw:z-index="251664384" draw:id="id3" draw:style-name="a6" draw:name="Oval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T66"><draw:frame draw:style-name="a7" draw:name="Picture 1" text:anchor-type="as-char" svg:x="0in" svg:y="0in" svg:width="4.43812in" svg:height="1.3231in" style:rel-width="scale" style:rel-height="scale"><draw:image xlink:href="media/image4.png" xlink:type="simple" xlink:show="embed" xlink:actuate="onLoad"/><svg:title/><svg:desc/></draw:frame></text:span></text:p>
      <text:p text:style-name="P67"/>
      <text:p text:style-name="P68">6. Instaliranje pip i kreiranje virtuelnog orkuženja</text:p>
      <text:list text:style-name="LFO4" text:continue-numbering="true">
        <text:list-item>
          <text:p text:style-name="P69">U<text:s/>VS Code terminalu<text:s/>pokrenuti<text:s/>komande:<text:s/></text:p>
          <text:list text:continue-numbering="true">
            <text:list-item>
              <text:p text:style-name="P70">python -m ensurepip</text:p>
            </text:list-item>
            <text:list-item>
              <text:p text:style-name="P71">python -m venv venv</text:p>
            </text:list-item>
            <text:list-item>
              <text:p text:style-name="P72">venv\Scripts\activate</text:p>
            </text:list-item>
          </text:list>
        </text:list-item>
      </text:list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r" fo:country="R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sr" style:country-asian="R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jela Curguz</meta:initial-creator>
    <dc:creator>Andjela Curguz</dc:creator>
    <meta:creation-date>2026-07-16T10:51:00Z</meta:creation-date>
    <dc:date>2026-07-16T13:25:00Z</dc:date>
    <meta:template xlink:href="Normal" xlink:type="simple"/>
    <meta:editing-cycles>1</meta:editing-cycles>
    <meta:editing-duration>PT2460S</meta:editing-duration>
    <meta:document-statistic meta:page-count="2" meta:paragraph-count="24" meta:word-count="192" meta:character-count="1219" meta:row-count="29" meta:non-whitespace-character-count="1051"/>
  </office:meta>
</office:document-meta>
</file>
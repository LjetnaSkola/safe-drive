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3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5in" fo:padding-bottom="0.05in" fo:padding-left="0.1in" fo:padding-right="0.1in" draw:textarea-vertical-align="top" draw:textarea-horizontal-align="left" draw:fill="solid" draw:fill-color="#e8e4f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6">
      <style:graphic-properties fo:wrap-option="wrap" fo:padding-top="0.05in" fo:padding-bottom="0.05in" fo:padding-left="0.1in" fo:padding-right="0.1in" draw:textarea-vertical-align="top" draw:textarea-horizontal-align="left" draw:fill="solid" draw:fill-color="#53465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1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2">
      <style:graphic-properties fo:wrap-option="wrap" fo:padding-top="0.05in" fo:padding-bottom="0.05in" fo:padding-left="0.1in" fo:padding-right="0.1in" draw:textarea-vertical-align="top" draw:textarea-horizontal-align="left" draw:fill="solid" draw:fill-color="#e8e4f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8">
      <style:graphic-properties fo:wrap-option="wrap" fo:padding-top="0.05in" fo:padding-bottom="0.05in" fo:padding-left="0.1in" fo:padding-right="0.1in" draw:textarea-vertical-align="top" draw:textarea-horizontal-align="left" draw:fill="solid" draw:fill-color="#e8e4f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4">
      <style:drawing-page-properties draw:fill="solid" draw:fill-color="#ffffff" draw:opacity="100%" presentation:transition-type="automatic" presentation:transition-speed="slow" smil:type="fade" smil:subtype="crossfade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b0a7b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b0a7b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wrap" fo:padding-top="0.05in" fo:padding-bottom="0.05in" fo:padding-left="0.1in" fo:padding-right="0.1in" draw:textarea-vertical-align="top" draw:textarea-horizontal-align="left" draw:fill="solid" draw:fill-color="#7d688f" draw:opacity="100%" draw:stroke="none" draw:shadow="visible" draw:shadow-offset-x="0in" draw:shadow-offset-y="0.02778in" draw:shadow-color="#1b2a33" draw:shadow-opacity="15%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eaf7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05">
      <style:graphic-properties fo:wrap-option="wrap" fo:padding-top="0.05in" fo:padding-bottom="0.05in" fo:padding-left="0.1in" fo:padding-right="0.1in" draw:textarea-vertical-align="top" draw:textarea-horizontal-align="left" draw:fill="solid" draw:fill-color="#0b2545" draw:opacity="100%" draw:stroke="solid" svg:stroke-width="0.01389in" svg:stroke-color="#16385c" svg:stroke-opacity="100%" draw:shadow="visible" draw:shadow-offset-x="0in" draw:shadow-offset-y="0.04167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08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1edec" svg:stroke-opacity="100%" draw:shadow="visible" draw:shadow-offset-x="0in" draw:shadow-offset-y="0.02778in" draw:shadow-color="#1b2a33" draw:shadow-opacity="10%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left" draw:fill="solid" draw:fill-color="#7d688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3">
      <style:drawing-page-properties draw:fill="solid" draw:fill-color="#ffffff" draw:opacity="100%" presentation:transition-type="automatic" presentation:transition-speed="slow" smil:type="fade" smil:subtype="crossfade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0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d6ece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draw:fill="none" draw:stroke="solid" svg:stroke-width="0.01389in" svg:stroke-color="#000000" svg:stroke-opacity="100%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6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d6ece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5b788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1edec" svg:stroke-opacity="100%" draw:shadow="visible" draw:shadow-offset-x="0in" draw:shadow-offset-y="0.02778in" draw:shadow-color="#1b2a33" draw:shadow-opacity="10%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solid" draw:fill-color="#ffffff" draw:opacity="100%" presentation:transition-type="automatic" presentation:transition-speed="slow" smil:type="fade" smil:subtype="crossfade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2">
      <style:text-properties fo:font-variant="normal" fo:text-transform="none" fo:color="#d6ece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d6ece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22">
      <style:graphic-properties fo:wrap-option="wrap" fo:padding-top="0.05in" fo:padding-bottom="0.05in" fo:padding-left="0.1in" fo:padding-right="0.1in" draw:textarea-vertical-align="top" draw:textarea-horizontal-align="left" draw:fill="solid" draw:fill-color="#7d688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 style:parent-style-name="Graphics">
      <style:graphic-properties draw:fill="none" fo:clip="rect(0.09208in, 0in, 0.3424in, 0in)" draw:stroke="none"/>
    </style:style>
    <style:style style:family="text" style:name="a173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9e79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2c39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2c39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0">
      <style:graphic-properties fo:wrap-option="wrap" fo:padding-top="0.05in" fo:padding-bottom="0.05in" fo:padding-left="0.1in" fo:padding-right="0.1in" draw:textarea-vertical-align="top" draw:textarea-horizontal-align="left" draw:fill="solid" draw:fill-color="#7d688f" draw:opacity="100%" draw:stroke="none" draw:shadow="visible" draw:shadow-offset-x="0in" draw:shadow-offset-y="0.02778in" draw:shadow-color="#1b2a33" draw:shadow-opacity="15%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5b788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2c39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1edec" svg:stroke-opacity="100%" draw:shadow="visible" draw:shadow-offset-x="0in" draw:shadow-offset-y="0.02778in" draw:shadow-color="#1b2a33" draw:shadow-opacity="10%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eaf7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3465f" svg:stroke-opacity="100%" draw:shadow="visible" draw:shadow-offset-x="0in" draw:shadow-offset-y="0.04167in" draw:shadow-color="#1b2a33" draw:shadow-opacity="12%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2809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67%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Arial" style:font-family-complex="Arial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left" draw:fill="solid" draw:fill-color="#0b254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Arial" style:font-family-complex="Arial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2c39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Arial" style:font-family-complex="Arial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f9e79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top" draw:textarea-horizontal-align="left" draw:fill="solid" draw:fill-color="#7d688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1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solid" draw:fill-color="#8d7ab2" draw:opacity="100%" draw:stroke="none" draw:shadow="visible" draw:shadow-offset-x="0in" draw:shadow-offset-y="0.02778in" draw:shadow-color="#1b2a33" draw:shadow-opacity="15%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5b788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Arial" style:font-family-complex="Arial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Arial" style:font-family-complex="Arial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5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e60141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897ca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transition-type="automatic" presentation:transition-speed="slow" smil:type="fade" smil:subtype="crossfade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4">
      <style:graphic-properties draw:fill="none" draw:stroke="solid" svg:stroke-width="0.01389in" svg:stroke-color="#000000" svg:stroke-opacity="100%"/>
    </style:style>
    <style:style style:family="text" style:name="a1564">
      <style:text-properties fo:font-variant="normal" fo:text-transform="none" fo:color="#eaf7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6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b0a7b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0">
      <style:graphic-properties fo:wrap-option="wrap" fo:padding-top="0.05in" fo:padding-bottom="0.05in" fo:padding-left="0.1in" fo:padding-right="0.1in" draw:textarea-vertical-align="top" draw:textarea-horizontal-align="left" draw:fill="solid" draw:fill-color="#0b2545" draw:opacity="100%" draw:stroke="solid" svg:stroke-width="0.01389in" svg:stroke-color="#16385c" svg:stroke-opacity="100%" draw:shadow="visible" draw:shadow-offset-x="0in" draw:shadow-offset-y="0.04167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7fa8b8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f9e79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d6ece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wrap" fo:padding-top="0.05in" fo:padding-bottom="0.05in" fo:padding-left="0.1in" fo:padding-right="0.1in" draw:textarea-vertical-align="top" draw:textarea-horizontal-align="left" draw:fill="solid" draw:fill-color="#7d688f" draw:opacity="100%" draw:stroke="none" draw:shadow="visible" draw:shadow-offset-x="0in" draw:shadow-offset-y="0.02778in" draw:shadow-color="#1b2a33" draw:shadow-opacity="15%" draw:auto-grow-width="false" draw:auto-grow-height="false"/>
      <style:paragraph-properties style:font-independent-line-spacing="true" style:writing-mode="lr-tb"/>
    </style:style>
    <style:style style:family="graphic" style:name="a2007">
      <style:graphic-properties fo:wrap-option="wrap" fo:padding-top="0.05in" fo:padding-bottom="0.05in" fo:padding-left="0.1in" fo:padding-right="0.1in" draw:textarea-vertical-align="top" draw:textarea-horizontal-align="left" draw:fill="solid" draw:fill-color="#e8e4f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1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eaf7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3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1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b0a7b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7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f9e79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b0a7b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5b788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0">
      <style:graphic-properties fo:wrap-option="wrap" fo:padding-top="0.05in" fo:padding-bottom="0.05in" fo:padding-left="0.1in" fo:padding-right="0.1in" draw:textarea-vertical-align="top" draw:textarea-horizontal-align="left" draw:fill="solid" draw:fill-color="#53465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7fa8b8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5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solid" draw:fill-color="#8d7ab2" draw:opacity="100%" draw:stroke="none" draw:shadow="visible" draw:shadow-offset-x="0in" draw:shadow-offset-y="0.02778in" draw:shadow-color="#1b2a33" draw:shadow-opacity="15%" draw:auto-grow-width="false" draw:auto-grow-height="false"/>
      <style:paragraph-properties style:font-independent-line-spacing="true" style:writing-mode="lr-tb"/>
    </style:style>
    <style:style style:family="graphic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5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5in" fo:padding-bottom="0.05in" fo:padding-left="0.1in" fo:padding-right="0.1in" draw:textarea-vertical-align="top" draw:textarea-horizontal-align="left" draw:fill="solid" draw:fill-color="#e8e4f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b0a7b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5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5b788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b0a7b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9fd8d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f9e79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4">
      <style:graphic-properties fo:wrap-option="wrap" fo:padding-top="0.05in" fo:padding-bottom="0.05in" fo:padding-left="0.1in" fo:padding-right="0.1in" draw:textarea-vertical-align="top" draw:textarea-horizontal-align="left" draw:fill="solid" draw:fill-color="#53465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d6ece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2">
      <style:graphic-properties fo:wrap-option="wrap" fo:padding-top="0.05in" fo:padding-bottom="0.05in" fo:padding-left="0.1in" fo:padding-right="0.1in" draw:textarea-vertical-align="top" draw:textarea-horizontal-align="left" draw:fill="solid" draw:fill-color="#53465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0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eaf7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6">
      <style:graphic-properties fo:wrap-option="wrap" fo:padding-top="0.05in" fo:padding-bottom="0.05in" fo:padding-left="0.1in" fo:padding-right="0.1in" draw:textarea-vertical-align="top" draw:textarea-horizontal-align="left" draw:fill="solid" draw:fill-color="#e8e4f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9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5b788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5b788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2c39a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4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f9e79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>
      <style:graphic-properties fo:wrap-option="wrap" fo:padding-top="0.05in" fo:padding-bottom="0.05in" fo:padding-left="0.1in" fo:padding-right="0.1in" draw:textarea-vertical-align="top" draw:textarea-horizontal-align="left" draw:fill="solid" draw:fill-color="#e8e4f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7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8">
      <style:graphic-properties fo:wrap-option="wrap" fo:padding-top="0.05in" fo:padding-bottom="0.05in" fo:padding-left="0.1in" fo:padding-right="0.1in" draw:textarea-vertical-align="top" draw:textarea-horizontal-align="left" draw:fill="solid" draw:fill-color="#53465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6">
      <style:graphic-properties fo:wrap-option="wrap" fo:padding-top="0.05in" fo:padding-bottom="0.05in" fo:padding-left="0.1in" fo:padding-right="0.1in" draw:textarea-vertical-align="top" draw:textarea-horizontal-align="left" draw:fill="solid" draw:fill-color="#53465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.05in" fo:padding-bottom="0.05in" fo:padding-left="0.1in" fo:padding-right="0.1in" draw:textarea-vertical-align="top" draw:textarea-horizontal-align="left" draw:fill="solid" draw:fill-color="#53465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1329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top" draw:textarea-horizontal-align="left" draw:fill="solid" draw:fill-color="#e8e4f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top" draw:textarea-horizontal-align="left" draw:fill="solid" draw:fill-color="#3c3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b2545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6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23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37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240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39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225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239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31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71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36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33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73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674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67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238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29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35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41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</office:automatic-styles>
  <office:body>
    <office:presentation>
      <draw:page draw:name="Slide221" draw:style-name="a1344" draw:master-page-name="Master1-Layout2-cust-1_main_title" presentation:presentation-page-layout-name="Master1-PPL2" draw:id="Slide-476">
        <draw:frame draw:id="id114" draw:style-name="a1345" draw:name="Picture 3" svg:x="0in" svg:y="0.46222in" svg:width="13.33333in" svg:height="7.03778in" style:rel-width="scale" style:rel-height="scale">
          <draw:image xlink:href="media/image1.png" xlink:type="simple" xlink:show="embed" xlink:actuate="onLoad"/>
          <svg:title/>
          <svg:desc/>
        </draw:frame>
        <draw:frame draw:id="id115" presentation:style-name="a1351" draw:name="Title 2" svg:x="0.61417in" svg:y="0.78346in" svg:width="9.11461in" svg:height="0.52362in" presentation:class="title" presentation:placeholder="false">
          <draw:text-box>
            <text:p text:style-name="a1350" text:class-names="" text:cond-style-name=""><text:span text:style-name="a1346" text:class-names="">Ljetna</text:span><text:span text:style-name="a1347" text:class-names=""><text:s text:c="1"/></text:span><text:span text:style-name="a1348" text:class-names="">skola</text:span><text:span text:style-name="a1349" text:class-names=""/></text:p>
          </draw:text-box>
          <svg:title/>
          <svg:desc/>
        </draw:frame>
        <draw:frame draw:id="id116" presentation:style-name="a1352" draw:name="Text Placeholder 4" svg:x="0.65104in" svg:y="2.60364in" svg:width="5.36458in" svg:height="1.19618in" presentation:class="outline" presentation:placeholder="true">
          <draw:text-box/>
          <svg:title/>
          <svg:desc/>
        </draw:frame>
        <draw:frame draw:id="id117" presentation:style-name="a1353" draw:name="Text Placeholder 6" svg:x="0.64963in" svg:y="1.23622in" svg:width="9.11458in" svg:height="0.43229in" presentation:class="outline" presentation:placeholder="true">
          <draw:text-box/>
          <svg:title/>
          <svg:desc/>
        </draw:frame>
        <draw:custom-shape svg:x="0in" svg:y="2.25156in" svg:width="6.66667in" svg:height="1.63194in" draw:id="id118" draw:style-name="a1356" draw:name="Rectangle 4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1363" draw:name="Title 13" svg:x="0.61285in" svg:y="2.51024in" svg:width="5.36633in" svg:height="1.25in">
          <draw:text-box>
            <text:p text:style-name="a1362" text:class-names="" text:cond-style-name=""><text:span text:style-name="a1357" text:class-names="">Jedinicno</text:span><text:span text:style-name="a1358" text:class-names=""><text:s text:c="1"/></text:span><text:span text:style-name="a1359" text:class-names="">testiranje</text:span><text:span text:style-name="a1360" text:class-names=""><text:s text:c="1"/>u C</text:span><text:span text:style-name="a1361" text:class-names=""/></text:p>
          </draw:text-box>
          <svg:title/>
          <svg:desc/>
        </draw:frame>
        <draw:custom-shape svg:x="6.53819in" svg:y="2.25156in" svg:width="0.12847in" svg:height="1.62847in" draw:id="id120" draw:style-name="a1366" draw:name="Rectangle 6">
          <svg:title/>
          <svg:desc/>
          <text:p text:style-name="a1365" text:class-names="" text:cond-style-name=""><text:span text:style-name="a1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47471424" draw:style-name="a1367" draw:master-page-name="Master1-Layout18-cust-Custom-Layout" presentation:presentation-page-layout-name="Master1-PPL18" draw:id="Slide-2147471679">
        <draw:custom-shape svg:x="0.70018in" svg:y="1.70945in" svg:width="0.52666in" svg:height="0.52666in" draw:id="id121" draw:style-name="a1371" draw:name="Oval 6">
          <svg:title/>
          <svg:desc/>
          <text:p text:style-name="a1370" text:class-names="" text:cond-style-name=""><text:span text:style-name="a1368" text:class-names="">1</text:span><text:span text:style-name="a13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0208in" svg:y="1.80449in" svg:width="9.05512in" svg:height="0.33659in" draw:id="id122" draw:style-name="a1374" draw:name="Rectangle 100">
          <svg:title/>
          <svg:desc/>
          <text:p text:style-name="a1373" text:class-names="" text:cond-style-name=""><text:span text:style-name="a1372" text:class-names="">Click to add t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0.08333in" svg:height="0.59028in" draw:id="id123" draw:style-name="a1377" draw:name="Rectangle 2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1380" draw:name="Title 1" svg:x="0.61285in" svg:y="0.82765in" svg:width="3.12649in" svg:height="0.47964in">
          <draw:text-box>
            <text:p text:style-name="a1379" text:class-names="" text:cond-style-name=""><text:span text:style-name="a1378" text:class-names="">Agenda</text:span></text:p>
          </draw:text-box>
          <svg:title/>
          <svg:desc/>
        </draw:frame>
        <draw:custom-shape svg:x="0.70018in" svg:y="2.45515in" svg:width="0.52666in" svg:height="0.52666in" draw:id="id125" draw:style-name="a1384" draw:name="Oval 6">
          <svg:title/>
          <svg:desc/>
          <text:p text:style-name="a1383" text:class-names="" text:cond-style-name=""><text:span text:style-name="a1381" text:class-names="">2</text:span><text:span text:style-name="a13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0018in" svg:y="3.20084in" svg:width="0.52666in" svg:height="0.52666in" draw:id="id126" draw:style-name="a1388" draw:name="Oval 6">
          <svg:title/>
          <svg:desc/>
          <text:p text:style-name="a1387" text:class-names="" text:cond-style-name=""><text:span text:style-name="a1385" text:class-names="">3</text:span><text:span text:style-name="a13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0018in" svg:y="3.94653in" svg:width="0.52666in" svg:height="0.52666in" draw:id="id127" draw:style-name="a1392" draw:name="Oval 6">
          <svg:title/>
          <svg:desc/>
          <text:p text:style-name="a1391" text:class-names="" text:cond-style-name=""><text:span text:style-name="a1389" text:class-names="">4</text:span><text:span text:style-name="a13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0018in" svg:y="4.69222in" svg:width="0.52666in" svg:height="0.52666in" draw:id="id128" draw:style-name="a1396" draw:name="Oval 6">
          <svg:title/>
          <svg:desc/>
          <text:p text:style-name="a1395" text:class-names="" text:cond-style-name=""><text:span text:style-name="a1393" text:class-names="">5</text:span><text:span text:style-name="a13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0018in" svg:y="5.43791in" svg:width="0.52666in" svg:height="0.52666in" draw:id="id129" draw:style-name="a1400" draw:name="Oval 6">
          <svg:title/>
          <svg:desc/>
          <text:p text:style-name="a1399" text:class-names="" text:cond-style-name=""><text:span text:style-name="a1397" text:class-names="">6</text:span><text:span text:style-name="a13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0018in" svg:y="6.18361in" svg:width="0.52666in" svg:height="0.52666in" draw:id="id130" draw:style-name="a1404" draw:name="Oval 6">
          <svg:title/>
          <svg:desc/>
          <text:p text:style-name="a1403" text:class-names="" text:cond-style-name=""><text:span text:style-name="a1401" text:class-names="">7</text:span><text:span text:style-name="a14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0208in" svg:y="2.55018in" svg:width="9.05512in" svg:height="0.33659in" draw:id="id131" draw:style-name="a1407" draw:name="Rectangle 100">
          <svg:title/>
          <svg:desc/>
          <text:p text:style-name="a1406" text:class-names="" text:cond-style-name=""><text:span text:style-name="a1405" text:class-names="">Click to add t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208in" svg:y="3.29588in" svg:width="9.05512in" svg:height="0.33659in" draw:id="id132" draw:style-name="a1410" draw:name="Rectangle 100">
          <svg:title/>
          <svg:desc/>
          <text:p text:style-name="a1409" text:class-names="" text:cond-style-name=""><text:span text:style-name="a1408" text:class-names="">Click to add t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208in" svg:y="4.04157in" svg:width="9.05512in" svg:height="0.33659in" draw:id="id133" draw:style-name="a1413" draw:name="Rectangle 100">
          <svg:title/>
          <svg:desc/>
          <text:p text:style-name="a1412" text:class-names="" text:cond-style-name=""><text:span text:style-name="a1411" text:class-names="">Click to add t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208in" svg:y="4.78726in" svg:width="9.05512in" svg:height="0.33659in" draw:id="id134" draw:style-name="a1416" draw:name="Rectangle 100">
          <svg:title/>
          <svg:desc/>
          <text:p text:style-name="a1415" text:class-names="" text:cond-style-name=""><text:span text:style-name="a1414" text:class-names="">Click to add t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208in" svg:y="5.53295in" svg:width="9.05512in" svg:height="0.33659in" draw:id="id135" draw:style-name="a1419" draw:name="Rectangle 100">
          <svg:title/>
          <svg:desc/>
          <text:p text:style-name="a1418" text:class-names="" text:cond-style-name=""><text:span text:style-name="a1417" text:class-names="">Click to add t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208in" svg:y="6.27865in" svg:width="9.05512in" svg:height="0.33659in" draw:id="id136" draw:style-name="a1422" draw:name="Rectangle 100">
          <svg:title/>
          <svg:desc/>
          <text:p text:style-name="a1421" text:class-names="" text:cond-style-name=""><text:span text:style-name="a1420" text:class-names="">Click to add tex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29">
          <draw:page-thumbnail draw:page-number="2" svg:x="0.75in" svg:y="1.25in" svg:width="6in" svg:height="3.375in" presentation:class="page" draw:id="id137" presentation:style-name="a1423" draw:name="Folienbildplatzhalter 1">
            <svg:title/>
            <svg:desc/>
          </draw:page-thumbnail>
          <draw:frame draw:id="id138" presentation:style-name="a142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428" draw:name="Foliennummernplatzhalter 3" svg:x="4.24826in" svg:y="9.49826in" svg:width="3.25in" svg:height="0.50174in">
            <draw:text-box>
              <text:p text:style-name="a1427" text:class-names="" text:cond-style-name=""><text:span text:style-name="a1425" text:class-names=""><text:page-number style:num-format="1" text:fixed="false">3</text:page-number></text:span><text:span text:style-name="a1426" text:class-names=""/></text:p>
            </draw:text-box>
            <svg:title/>
            <svg:desc/>
          </draw:frame>
        </presentation:notes>
      </draw:page>
      <draw:page draw:name="Slide2147471429" draw:style-name="a1430" draw:master-page-name="Master1-Layout19-cust-section-title" presentation:presentation-page-layout-name="Master1-PPL19" draw:id="Slide-2147471684">
        <draw:frame draw:id="id140" presentation:style-name="a1439" draw:name="Title 1" svg:x="3.98306in" svg:y="3.86353in" svg:width="9.11461in" svg:height="0.52362in" presentation:class="title" presentation:placeholder="false">
          <draw:text-box>
            <text:p text:style-name="a1438" text:class-names="" text:cond-style-name=""><text:span text:style-name="a1431" text:class-names="">1.</text:span><text:span text:style-name="a1432" text:class-names=""><text:s text:c="1"/></text:span><text:span text:style-name="a1433" text:class-names="">Jedinicno</text:span><text:span text:style-name="a1434" text:class-names=""><text:s text:c="1"/></text:span><text:span text:style-name="a1435" text:class-names="">testiranj</text:span><text:span text:style-name="a1436" text:class-names="">e</text:span><text:span text:style-name="a1437" text:class-names=""/></text:p>
          </draw:text-box>
          <svg:title/>
          <svg:desc/>
        </draw:frame>
      </draw:page>
      <draw:page draw:name="Slide2147471430" draw:style-name="a1440" draw:master-page-name="Master1-Layout10-cust-10_one_column" presentation:presentation-page-layout-name="Master1-PPL10" draw:id="Slide-2147471685">
        <draw:frame draw:id="id141" presentation:style-name="a1447" draw:name="Title 1" svg:x="0.61417in" svg:y="0.78346in" svg:width="9.11461in" svg:height="0.52362in" presentation:class="title" presentation:placeholder="false">
          <draw:text-box>
            <text:p text:style-name="a1446" text:class-names="" text:cond-style-name=""><text:span text:style-name="a1441" text:class-names="">Sta je<text:s text:c="1"/></text:span><text:span text:style-name="a1442" text:class-names="">jedinicno</text:span><text:span text:style-name="a1443" text:class-names=""><text:s text:c="1"/></text:span><text:span text:style-name="a1444" text:class-names="">testiranje</text:span><text:span text:style-name="a1445" text:class-names=""/></text:p>
          </draw:text-box>
          <svg:title/>
          <svg:desc/>
        </draw:frame>
        <draw:frame draw:id="id142" presentation:style-name="a1526" draw:name="Text Placeholder 2" svg:x="0.61417in" svg:y="1.64286in" svg:width="12.10458in" svg:height="5.18572in" presentation:class="outline" presentation:placeholder="false">
          <draw:text-box>
            <text:list text:style-name="a1477">
              <text:list-item>
                <text:p text:style-name="a1476" text:class-names="" text:cond-style-name=""><text:span text:style-name="a1448" text:class-names="">Jedinicni</text:span><text:span text:style-name="a1449" text:class-names=""><text:s text:c="1"/>test<text:s text:c="1"/></text:span><text:span text:style-name="a1450" text:class-names="">provjerava</text:span><text:span text:style-name="a1451" text:class-names=""><text:s text:c="1"/></text:span><text:span text:style-name="a1452" text:class-names="">ponasanje</text:span><text:span text:style-name="a1453" text:class-names=""><text:s text:c="1"/></text:span><text:span text:style-name="a1454" text:class-names="">jedne</text:span><text:span text:style-name="a1455" text:class-names=""><text:s text:c="1"/></text:span><text:span text:style-name="a1456" text:class-names="">funkcije</text:span><text:span text:style-name="a1457" text:class-names=""><text:s text:c="1"/></text:span><text:span text:style-name="a1458" text:class-names="">ili</text:span><text:span text:style-name="a1459" text:class-names=""><text:s text:c="1"/></text:span><text:span text:style-name="a1460" text:class-names="">modula</text:span><text:span text:style-name="a1461" text:class-names="">,<text:s text:c="1"/></text:span><text:span text:style-name="a1462" text:class-names="">izolovano</text:span><text:span text:style-name="a1463" text:class-names=""><text:s text:c="1"/>od<text:s text:c="1"/></text:span><text:span text:style-name="a1464" text:class-names="">ostatka</text:span><text:span text:style-name="a1465" text:class-names=""><text:s text:c="1"/>Sistema (</text:span><text:span text:style-name="a1466" text:class-names="">baze</text:span><text:span text:style-name="a1467" text:class-names="">,<text:s text:c="1"/></text:span><text:span text:style-name="a1468" text:class-names="">mreza</text:span><text:span text:style-name="a1469" text:class-names="">,<text:s text:c="1"/></text:span><text:span text:style-name="a1470" text:class-names="">hardver</text:span><text:span text:style-name="a1471" text:class-names="">,<text:s text:c="1"/></text:span><text:span text:style-name="a1472" text:class-names="">drugi</text:span><text:span text:style-name="a1473" text:class-names=""><text:s text:c="1"/></text:span><text:span text:style-name="a1474" text:class-names="">modul</text:span><text:span text:style-name="a1475" text:class-names="">)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78" text:class-names="">Zasto</text:span><text:span text:style-name="a1479" text:class-names=""><text:s text:c="1"/></text:span><text:span text:style-name="a1480" text:class-names="">je</text:span><text:span text:style-name="a1481" text:class-names=""><text:s text:c="1"/></text:span><text:span text:style-name="a1482" text:class-names="">vazno</text:span><text:span text:style-name="a1483" text:class-names="">?</text:span><text:span text:style-name="a1484" text:class-names=""/></text:p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87" text:class-names="">Rano<text:s text:c="1"/></text:span><text:span text:style-name="a1488" text:class-names="">otkrivanje</text:span><text:span text:style-name="a1489" text:class-names=""><text:s text:c="1"/></text:span><text:span text:style-name="a1490" text:class-names="">gresaka</text:span><text:span text:style-name="a1491" text:class-names=""/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494" text:class-names="">Sigurno</text:span><text:span text:style-name="a1495" text:class-names=""><text:s text:c="1"/></text:span><text:span text:style-name="a1496" text:class-names="">refakturisanje</text:span><text:span text:style-name="a1497" text:class-names=""><text:s text:c="1"/></text:span><text:span text:style-name="a1498" text:class-names="">postojeceg</text:span><text:span text:style-name="a1499" text:class-names=""><text:s text:c="1"/></text:span><text:span text:style-name="a1500" text:class-names="">koda</text:span><text:span text:style-name="a1501" text:class-names=""/></text:p>
                  </text:list-item>
                </text:list>
              </text:list-item>
            </text:list>
            <text:list text:style-name="a1515">
              <text:list-item>
                <text:list text:style-name="a1515">
                  <text:list-item>
                    <text:p text:style-name="a1514" text:class-names="" text:cond-style-name=""><text:span text:style-name="a1504" text:class-names="">Testovi</text:span><text:span text:style-name="a1505" text:class-names=""><text:s text:c="1"/></text:span><text:span text:style-name="a1506" text:class-names="">su</text:span><text:span text:style-name="a1507" text:class-names=""><text:s text:c="1"/></text:span><text:span text:style-name="a1508" text:class-names="">ziva</text:span><text:span text:style-name="a1509" text:class-names=""><text:s text:c="1"/></text:span><text:span text:style-name="a1510" text:class-names="">dokumentacija</text:span><text:span text:style-name="a1511" text:class-names=""><text:s text:c="1"/></text:span><text:span text:style-name="a1512" text:class-names="">Sistema</text:span><text:span text:style-name="a1513" text:class-names=""/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16" text:class-names="">Kriticno</text:span><text:span text:style-name="a1517" text:class-names=""><text:s text:c="1"/>za<text:s text:c="1"/></text:span><text:span text:style-name="a1518" text:class-names="">emebeded</text:span><text:span text:style-name="a1519" text:class-names="">/ C<text:s text:c="1"/></text:span><text:span text:style-name="a1520" text:class-names="">sistemski</text:span><text:span text:style-name="a1521" text:class-names=""><text:s text:c="1"/></text:span><text:span text:style-name="a1522" text:class-names="">kod</text:span><text:span text:style-name="a15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47471431" draw:style-name="a1527" draw:master-page-name="Master1-Layout10-cust-10_one_column" presentation:presentation-page-layout-name="Master1-PPL10" draw:id="Slide-2147471686">
        <draw:frame draw:id="id143" presentation:style-name="a1537" draw:name="Title 1" svg:x="0.61417in" svg:y="0.78346in" svg:width="9.11461in" svg:height="0.52362in" presentation:class="title" presentation:placeholder="false">
          <draw:text-box>
            <text:p text:style-name="a1536" text:class-names="" text:cond-style-name=""><text:span text:style-name="a1528" text:class-names="">Osobine</text:span><text:span text:style-name="a1529" text:class-names=""><text:s text:c="1"/></text:span><text:span text:style-name="a1530" text:class-names="">dobrog</text:span><text:span text:style-name="a1531" text:class-names=""><text:s text:c="1"/></text:span><text:span text:style-name="a1532" text:class-names="">jedinicnog</text:span><text:span text:style-name="a1533" text:class-names=""><text:s text:c="1"/></text:span><text:span text:style-name="a1534" text:class-names="">testa</text:span><text:span text:style-name="a1535" text:class-names=""/></text:p>
          </draw:text-box>
          <svg:title/>
          <svg:desc/>
        </draw:frame>
        <draw:custom-shape svg:x="0.60167in" svg:y="1.85556in" svg:width="2.202in" svg:height="4.5in" draw:id="id144" draw:style-name="a1540" draw:name="Shape 2">
          <svg:title/>
          <svg:desc/>
          <text:p text:style-name="a1539" text:class-names="" text:cond-style-name=""><text:span text:style-name="a15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60167in" svg:y="2.10556in" svg:width="2.202in" svg:height="1.1in" draw:id="id145" draw:style-name="a1544" draw:name="Text 3">
          <svg:title/>
          <svg:desc/>
          <text:p text:style-name="a1543" text:class-names="" text:cond-style-name=""><text:span text:style-name="a1541" text:class-names="">F</text:span><text:span text:style-name="a1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167in" svg:y="3.20556in" svg:width="1.902in" svg:height="0.5in" draw:id="id146" draw:style-name="a1548" draw:name="Text 4">
          <svg:title/>
          <svg:desc/>
          <text:p text:style-name="a1547" text:class-names="" text:cond-style-name=""><text:span text:style-name="a1545" text:class-names="">Fast</text:span><text:span text:style-name="a1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167in" svg:y="3.80556in" svg:width="1.842in" svg:height="2.3in" draw:id="id147" draw:style-name="a1552" draw:name="Text 5">
          <svg:title/>
          <svg:desc/>
          <text:p text:style-name="a1551" text:class-names="" text:cond-style-name=""><text:span text:style-name="a1549" text:class-names="">Testovi se izvršavaju brzo — cijeli set za sekunde, ne minute.</text:span><text:span text:style-name="a1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367in" svg:y="1.85556in" svg:width="2.202in" svg:height="4.5in" draw:id="id148" draw:style-name="a1555" draw:name="Shape 6">
          <svg:title/>
          <svg:desc/>
          <text:p text:style-name="a1554" text:class-names="" text:cond-style-name=""><text:span text:style-name="a15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08367in" svg:y="2.10556in" svg:width="2.202in" svg:height="1.1in" draw:id="id149" draw:style-name="a1559" draw:name="Text 7">
          <svg:title/>
          <svg:desc/>
          <text:p text:style-name="a1558" text:class-names="" text:cond-style-name=""><text:span text:style-name="a1556" text:class-names="">I</text:span><text:span text:style-name="a1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3367in" svg:y="3.20556in" svg:width="1.902in" svg:height="0.5in" draw:id="id150" draw:style-name="a1563" draw:name="Text 8">
          <svg:title/>
          <svg:desc/>
          <text:p text:style-name="a1562" text:class-names="" text:cond-style-name=""><text:span text:style-name="a1560" text:class-names="">Isolated</text:span><text:span text:style-name="a1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6367in" svg:y="3.80556in" svg:width="1.842in" svg:height="2.3in" draw:id="id151" draw:style-name="a1567" draw:name="Text 9">
          <svg:title/>
          <svg:desc/>
          <text:p text:style-name="a1566" text:class-names="" text:cond-style-name=""><text:span text:style-name="a1564" text:class-names="">Nezavisni jedni od drugih; redoslijed izvršavanja ne smije uticati na rezultat.</text:span><text:span text:style-name="a1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567in" svg:y="1.85556in" svg:width="2.202in" svg:height="4.5in" draw:id="id152" draw:style-name="a1570" draw:name="Shape 10">
          <svg:title/>
          <svg:desc/>
          <text:p text:style-name="a1569" text:class-names="" text:cond-style-name=""><text:span text:style-name="a15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56567in" svg:y="2.10556in" svg:width="2.202in" svg:height="1.1in" draw:id="id153" draw:style-name="a1574" draw:name="Text 11">
          <svg:title/>
          <svg:desc/>
          <text:p text:style-name="a1573" text:class-names="" text:cond-style-name=""><text:span text:style-name="a1571" text:class-names="">R</text:span><text:span text:style-name="a1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1567in" svg:y="3.20556in" svg:width="1.902in" svg:height="0.5in" draw:id="id154" draw:style-name="a1578" draw:name="Text 12">
          <svg:title/>
          <svg:desc/>
          <text:p text:style-name="a1577" text:class-names="" text:cond-style-name=""><text:span text:style-name="a1575" text:class-names="">Repeatable</text:span><text:span text:style-name="a1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4567in" svg:y="3.80556in" svg:width="1.842in" svg:height="2.3in" draw:id="id155" draw:style-name="a1582" draw:name="Text 13">
          <svg:title/>
          <svg:desc/>
          <text:p text:style-name="a1581" text:class-names="" text:cond-style-name=""><text:span text:style-name="a1579" text:class-names="">Isti rezultat u svakom okruženju — bez oslanjanja na mrežu ili spoljne servise.</text:span><text:span text:style-name="a1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4767in" svg:y="1.85556in" svg:width="2.202in" svg:height="4.5in" draw:id="id156" draw:style-name="a1585" draw:name="Shape 14">
          <svg:title/>
          <svg:desc/>
          <text:p text:style-name="a1584" text:class-names="" text:cond-style-name=""><text:span text:style-name="a15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04767in" svg:y="2.10556in" svg:width="2.202in" svg:height="1.1in" draw:id="id157" draw:style-name="a1589" draw:name="Text 15">
          <svg:title/>
          <svg:desc/>
          <text:p text:style-name="a1588" text:class-names="" text:cond-style-name=""><text:span text:style-name="a1586" text:class-names="">S</text:span><text:span text:style-name="a1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9767in" svg:y="3.20556in" svg:width="1.902in" svg:height="0.5in" draw:id="id158" draw:style-name="a1593" draw:name="Text 16">
          <svg:title/>
          <svg:desc/>
          <text:p text:style-name="a1592" text:class-names="" text:cond-style-name=""><text:span text:style-name="a1590" text:class-names="">Self-validating</text:span><text:span text:style-name="a1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2767in" svg:y="3.80556in" svg:width="1.842in" svg:height="2.3in" draw:id="id159" draw:style-name="a1597" draw:name="Text 17">
          <svg:title/>
          <svg:desc/>
          <text:p text:style-name="a1596" text:class-names="" text:cond-style-name=""><text:span text:style-name="a1594" text:class-names="">Test sam odlučuje prolazi/pada (pass/fail) — bez ručne provjere ispisa.</text:span><text:span text:style-name="a1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2967in" svg:y="1.85556in" svg:width="2.202in" svg:height="4.5in" draw:id="id160" draw:style-name="a1600" draw:name="Shape 18">
          <svg:title/>
          <svg:desc/>
          <text:p text:style-name="a1599" text:class-names="" text:cond-style-name=""><text:span text:style-name="a15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52967in" svg:y="2.10556in" svg:width="2.202in" svg:height="1.1in" draw:id="id161" draw:style-name="a1604" draw:name="Text 19">
          <svg:title/>
          <svg:desc/>
          <text:p text:style-name="a1603" text:class-names="" text:cond-style-name=""><text:span text:style-name="a1601" text:class-names="">T</text:span><text:span text:style-name="a1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967in" svg:y="3.20556in" svg:width="1.902in" svg:height="0.5in" draw:id="id162" draw:style-name="a1608" draw:name="Text 20">
          <svg:title/>
          <svg:desc/>
          <text:p text:style-name="a1607" text:class-names="" text:cond-style-name=""><text:span text:style-name="a1605" text:class-names="">Timely</text:span><text:span text:style-name="a1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0967in" svg:y="3.80556in" svg:width="1.842in" svg:height="2.3in" draw:id="id163" draw:style-name="a1612" draw:name="Text 21">
          <svg:title/>
          <svg:desc/>
          <text:p text:style-name="a1611" text:class-names="" text:cond-style-name=""><text:span text:style-name="a1609" text:class-names="">Pišu se blizu vremena pisanja koda kojeg testiraju, idealno prije ili odmah nakon.</text:span><text:span text:style-name="a1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47471432" draw:style-name="a1613" draw:master-page-name="Master1-Layout19-cust-section-title" presentation:presentation-page-layout-name="Master1-PPL19" draw:id="Slide-2147471687">
        <draw:frame draw:id="id164" presentation:style-name="a1617" draw:name="Title 1" svg:x="3.98306in" svg:y="3.86353in" svg:width="9.11461in" svg:height="0.52362in" presentation:class="title" presentation:placeholder="false">
          <draw:text-box>
            <text:p text:style-name="a1616" text:class-names="" text:cond-style-name=""><text:span text:style-name="a1614" text:class-names="">2. Unity Test Framework</text:span><text:span text:style-name="a1615" text:class-names=""/></text:p>
          </draw:text-box>
          <svg:title/>
          <svg:desc/>
        </draw:frame>
      </draw:page>
      <draw:page draw:name="Slide2147471433" draw:style-name="a1618" draw:master-page-name="Master1-Layout10-cust-10_one_column" presentation:presentation-page-layout-name="Master1-PPL10" draw:id="Slide-2147471688">
        <draw:frame draw:id="id165" presentation:style-name="a1625" draw:name="Title 1" svg:x="0.61417in" svg:y="0.78346in" svg:width="9.11461in" svg:height="0.52362in" presentation:class="title" presentation:placeholder="false">
          <draw:text-box>
            <text:p text:style-name="a1624" text:class-names="" text:cond-style-name=""><text:span text:style-name="a1619" text:class-names="">Sta je<text:s text:c="1"/></text:span><text:span text:style-name="a1620" text:class-names="">jedinicno</text:span><text:span text:style-name="a1621" text:class-names=""><text:s text:c="1"/></text:span><text:span text:style-name="a1622" text:class-names="">testiranje</text:span><text:span text:style-name="a1623" text:class-names=""/></text:p>
          </draw:text-box>
          <svg:title/>
          <svg:desc/>
        </draw:frame>
        <draw:frame draw:id="id166" presentation:style-name="a1731" draw:name="Text Placeholder 2" svg:x="0.61417in" svg:y="1.64286in" svg:width="12.10458in" svg:height="5.18572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Cisti ANSI C</text:span></text:p>
              </text:list-item>
            </text:list>
            <text:list text:style-name="a1639">
              <text:list-item>
                <text:list text:style-name="a1639">
                  <text:list-item>
                    <text:p text:style-name="a1638" text:class-names="" text:cond-style-name=""><text:span text:style-name="a1629" text:class-names="">Nema<text:s text:c="1"/></text:span><text:span text:style-name="a1630" text:class-names="">zavisnosti</text:span><text:span text:style-name="a1631" text:class-names=""><text:s text:c="1"/>–<text:s text:c="1"/></text:span><text:span text:style-name="a1632" text:class-names="">pogodan</text:span><text:span text:style-name="a1633" text:class-names=""><text:s text:c="1"/>za embedded<text:s text:c="1"/></text:span><text:span text:style-name="a1634" text:class-names="">i</text:span><text:span text:style-name="a1635" text:class-names=""><text:s text:c="1"/>cross-compile<text:s text:c="1"/></text:span><text:span text:style-name="a1636" text:class-names="">platforme</text:span><text:span text:style-name="a1637" text:class-names=""/></text:p>
                  </text:list-item>
                </text:list>
              </text:list-item>
            </text:list>
            <text:list text:style-name="a1649">
              <text:list-item>
                <text:p text:style-name="a1648" text:class-names="" text:cond-style-name=""><text:span text:style-name="a1640" text:class-names="">Jedan</text:span><text:span text:style-name="a1641" text:class-names=""><text:s text:c="1"/></text:span><text:span text:style-name="a1642" text:class-names="">header</text:span><text:span text:style-name="a1643" text:class-names=""><text:s text:c="1"/></text:span><text:span text:style-name="a1644" text:class-names="">+</text:span><text:span text:style-name="a1645" text:class-names=""><text:s text:c="1"/></text:span><text:span text:style-name="a1646" text:class-names="">izvor</text:span><text:span text:style-name="a1647" text:class-names=""/></text:p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50" text:class-names="">Unity.</text:span><text:span text:style-name="a1651" text:class-names="">h</text:span><text:span text:style-name="a1652" text:class-names="">,</text:span><text:span text:style-name="a1653" text:class-names=""><text:s text:c="1"/></text:span><text:span text:style-name="a1654" text:class-names="">unity.c</text:span><text:span text:style-name="a1655" text:class-names=""><text:s text:c="1"/></text:span><text:span text:style-name="a1656" text:class-names="">(+<text:s text:c="1"/></text:span><text:span text:style-name="a1657" text:class-names="">unity_internals.h</text:span><text:span text:style-name="a1658" text:class-names="">)</text:span><text:span text:style-name="a1659" text:class-names=""><text:s text:c="1"/></text:span><text:span text:style-name="a1660" text:class-names="">–<text:s text:c="1"/></text:span><text:span text:style-name="a1661" text:class-names="">lako</text:span><text:span text:style-name="a1662" text:class-names=""><text:s text:c="1"/></text:span><text:span text:style-name="a1663" text:class-names="">se</text:span><text:span text:style-name="a1664" text:class-names=""><text:s text:c="1"/></text:span><text:span text:style-name="a1665" text:class-names="">ubacuje</text:span><text:span text:style-name="a1666" text:class-names=""><text:s text:c="1"/></text:span><text:span text:style-name="a1667" text:class-names="">u</text:span><text:span text:style-name="a1668" text:class-names=""><text:s text:c="1"/></text:span><text:span text:style-name="a1669" text:class-names="">bilo</text:span><text:span text:style-name="a1670" text:class-names=""><text:s text:c="1"/>koji<text:s text:c="1"/></text:span><text:span text:style-name="a1671" text:class-names="">projekat</text:span><text:span text:style-name="a1672" text:class-names=""/></text:p>
                  </text:list-item>
                </text:list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>MACRO API</text:span></text:p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78" text:class-names="">TEST_ASSERT_*<text:s text:c="1"/></text:span><text:span text:style-name="a1679" text:class-names="">makroi</text:span><text:span text:style-name="a1680" text:class-names=""><text:s text:c="1"/></text:span><text:span text:style-name="a1681" text:class-names="">daju</text:span><text:span text:style-name="a1682" text:class-names=""><text:s text:c="1"/></text:span><text:span text:style-name="a1683" text:class-names="">jasne</text:span><text:span text:style-name="a1684" text:class-names=""><text:s text:c="1"/></text:span><text:span text:style-name="a1685" text:class-names="">poruke</text:span><text:span text:style-name="a1686" text:class-names=""><text:s text:c="1"/>o<text:s text:c="1"/></text:span><text:span text:style-name="a1687" text:class-names="">gresci</text:span><text:span text:style-name="a1688" text:class-names=""><text:s text:c="1"/></text:span><text:span text:style-name="a1689" text:class-names="">sa</text:span><text:span text:style-name="a1690" text:class-names=""><text:s text:c="1"/></text:span><text:span text:style-name="a1691" text:class-names="">brojem</text:span><text:span text:style-name="a1692" text:class-names=""><text:s text:c="1"/></text:span><text:span text:style-name="a1693" text:class-names="">linija</text:span><text:span text:style-name="a1694" text:class-names=""/></text:p>
                  </text:list-item>
                </text:list>
              </text:list-item>
            </text:list>
            <text:list text:style-name="a1700">
              <text:list-item>
                <text:p text:style-name="a1699" text:class-names="" text:cond-style-name=""><text:span text:style-name="a1697" text:class-names="">Pogodan</text:span><text:span text:style-name="a1698" text:class-names=""><text:s text:c="1"/>za embedded</text:span></text:p>
              </text:list-item>
            </text:list>
            <text:list text:style-name="a1711">
              <text:list-item>
                <text:list text:style-name="a1711">
                  <text:list-item>
                    <text:p text:style-name="a1710" text:class-names="" text:cond-style-name=""><text:span text:style-name="a1701" text:class-names="">Radi</text:span><text:span text:style-name="a1702" text:class-names=""><text:s text:c="1"/></text:span><text:span text:style-name="a1703" text:class-names="">bez</text:span><text:span text:style-name="a1704" text:class-names=""><text:s text:c="1"/></text:span><text:span text:style-name="a1705" text:class-names="">standardne</text:span><text:span text:style-name="a1706" text:class-names=""><text:s text:c="1"/></text:span><text:span text:style-name="a1707" text:class-names="">biblio</text:span><text:span text:style-name="a1708" text:class-names="">teke</text:span><text:span text:style-name="a1709" text:class-names="">/ OS<text:s text:c="1"/></text:span></text:p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2" text:class-names="">Cesta</text:span><text:span text:style-name="a1713" text:class-names=""><text:s text:c="1"/></text:span><text:span text:style-name="a1714" text:class-names="">kombinacija</text:span><text:span text:style-name="a1715" text:class-names=""><text:s text:c="1"/></text:span><text:span text:style-name="a1716" text:class-names="">uz</text:span><text:span text:style-name="a1717" text:class-names=""><text:s text:c="1"/></text:span><text:span text:style-name="a1718" text:class-names="">Cmock</text:span><text:span text:style-name="a1719" text:class-names=""/></text:p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p text:style-name="a1729" text:class-names="" text:cond-style-name=""><text:span text:style-name="a1722" text:class-names="">Fleksibilan</text:span><text:span text:style-name="a1723" text:class-names=""><text:s text:c="1"/></text:span><text:span text:style-name="a1724" text:class-names="">izlaz</text:span><text:span text:style-name="a1725" text:class-names=""><text:s text:c="1"/></text:span><text:span text:style-name="a1726" text:class-names="">(</text:span><text:span text:style-name="a1727" text:class-names="">Uart</text:span><text:span text:style-name="a1728" text:class-names="">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47471435" draw:style-name="a1732" draw:master-page-name="Master1-Layout10-cust-10_one_column" presentation:presentation-page-layout-name="Master1-PPL10" draw:id="Slide-2147471690">
        <draw:frame draw:id="id167" presentation:style-name="a1739" draw:name="Title 1" svg:x="0.61417in" svg:y="0.78346in" svg:width="9.11461in" svg:height="0.52362in" presentation:class="title" presentation:placeholder="false">
          <draw:text-box>
            <text:p text:style-name="a1738" text:class-names="" text:cond-style-name=""><text:span text:style-name="a1733" text:class-names="">Sta je<text:s text:c="1"/></text:span><text:span text:style-name="a1734" text:class-names="">jedinicno</text:span><text:span text:style-name="a1735" text:class-names=""><text:s text:c="1"/></text:span><text:span text:style-name="a1736" text:class-names="">testiranje</text:span><text:span text:style-name="a1737" text:class-names=""/></text:p>
          </draw:text-box>
          <svg:title/>
          <svg:desc/>
        </draw:frame>
        <draw:custom-shape svg:x="0.6in" svg:y="1.5in" svg:width="5.4in" svg:height="5.05in" draw:id="id168" draw:style-name="a1742" draw:name="Shape 1">
          <svg:title/>
          <svg:desc/>
          <text:p text:style-name="a1741" text:class-names="" text:cond-style-name=""><text:span text:style-name="a17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5in" svg:y="1.75in" svg:width="4.8in" svg:height="0.4in" draw:id="id169" draw:style-name="a1746" draw:name="Text 2">
          <svg:title/>
          <svg:desc/>
          <text:p text:style-name="a1745" text:class-names="" text:cond-style-name=""><text:span text:style-name="a1743" text:class-names="">Osnovne datoteke</text:span><text:span text:style-name="a1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in" svg:y="2.25in" svg:width="4.75in" svg:height="2.35in" draw:id="id170" draw:style-name="a1749" draw:name="Shape 3">
          <svg:title/>
          <svg:desc/>
          <text:p text:style-name="a1748" text:class-names="" text:cond-style-name=""><text:span text:style-name="a17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5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2in" svg:y="2.4in" svg:width="4.3in" svg:height="2.1in" draw:id="id171" draw:style-name="a1774" draw:name="Text 4">
          <svg:title/>
          <svg:desc/>
          <text:p text:style-name="a1752" text:class-names="" text:cond-style-name=""><text:span text:style-name="a1750" text:class-names="">src/</text:span><text:span text:style-name="a1751" text:class-names=""/></text:p>
          <text:p text:style-name="a1755" text:class-names="" text:cond-style-name=""><text:span text:style-name="a1753" text:class-names=""><text:s text:c="2"/>math_utils.c / .h</text:span><text:span text:style-name="a1754" text:class-names=""/></text:p>
          <text:p text:style-name="a1758" text:class-names="" text:cond-style-name=""><text:span text:style-name="a1756" text:class-names="">unity/</text:span><text:span text:style-name="a1757" text:class-names=""/></text:p>
          <text:p text:style-name="a1761" text:class-names="" text:cond-style-name=""><text:span text:style-name="a1759" text:class-names=""><text:s text:c="2"/>unity.c</text:span><text:span text:style-name="a1760" text:class-names=""/></text:p>
          <text:p text:style-name="a1764" text:class-names="" text:cond-style-name=""><text:span text:style-name="a1762" text:class-names=""><text:s text:c="2"/>unity.h</text:span><text:span text:style-name="a1763" text:class-names=""/></text:p>
          <text:p text:style-name="a1767" text:class-names="" text:cond-style-name=""><text:span text:style-name="a1765" text:class-names=""><text:s text:c="2"/>unity_internals.h</text:span><text:span text:style-name="a1766" text:class-names=""/></text:p>
          <text:p text:style-name="a1770" text:class-names="" text:cond-style-name=""><text:span text:style-name="a1768" text:class-names="">test/</text:span><text:span text:style-name="a1769" text:class-names=""/></text:p>
          <text:p text:style-name="a1773" text:class-names="" text:cond-style-name=""><text:span text:style-name="a1771" text:class-names=""><text:s text:c="2"/>test_math_utils.c</text:span><text:span text:style-name="a1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in" svg:y="4.91in" svg:width="0.14in" svg:height="0.14in" draw:id="id172" draw:style-name="a1777" draw:name="Shape 5">
          <svg:title/>
          <svg:desc/>
          <text:p text:style-name="a1776" text:class-names="" text:cond-style-name=""><text:span text:style-name="a17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25in" svg:y="4.77in" svg:width="4.6in" svg:height="0.5in" draw:id="id173" draw:style-name="a1782" draw:name="Text 6">
          <svg:title/>
          <svg:desc/>
          <text:p text:style-name="a1781" text:class-names="" text:cond-style-name=""><text:span text:style-name="a1778" text:class-names="">unity.c / unity.h <text:s text:c="1"/></text:span><text:span text:style-name="a1779" text:class-names="">Jezgro frameworka — makroi i mehanizam poređenja</text:span><text:span text:style-name="a1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in" svg:y="5.49in" svg:width="0.14in" svg:height="0.14in" draw:id="id174" draw:style-name="a1785" draw:name="Shape 7">
          <svg:title/>
          <svg:desc/>
          <text:p text:style-name="a1784" text:class-names="" text:cond-style-name=""><text:span text:style-name="a17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25in" svg:y="5.35in" svg:width="4.6in" svg:height="0.5in" draw:id="id175" draw:style-name="a1790" draw:name="Text 8">
          <svg:title/>
          <svg:desc/>
          <text:p text:style-name="a1789" text:class-names="" text:cond-style-name=""><text:span text:style-name="a1786" text:class-names="">setUp() <text:s text:c="1"/></text:span><text:span text:style-name="a1787" text:class-names="">Poziva se prije svakog testa (priprema)</text:span><text:span text:style-name="a1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in" svg:y="6.07in" svg:width="0.14in" svg:height="0.14in" draw:id="id176" draw:style-name="a1793" draw:name="Shape 9">
          <svg:title/>
          <svg:desc/>
          <text:p text:style-name="a1792" text:class-names="" text:cond-style-name=""><text:span text:style-name="a17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25in" svg:y="5.93in" svg:width="4.6in" svg:height="0.5in" draw:id="id177" draw:style-name="a1798" draw:name="Text 10">
          <svg:title/>
          <svg:desc/>
          <text:p text:style-name="a1797" text:class-names="" text:cond-style-name=""><text:span text:style-name="a1794" text:class-names="">tearDown() <text:s text:c="1"/></text:span><text:span text:style-name="a1795" text:class-names="">Poziva se poslije svakog testa (čišćenje)</text:span><text:span text:style-name="a1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1.5in" svg:width="6in" svg:height="0.4in" draw:id="id178" draw:style-name="a1802" draw:name="Text 11">
          <svg:title/>
          <svg:desc/>
          <text:p text:style-name="a1801" text:class-names="" text:cond-style-name=""><text:span text:style-name="a1799" text:class-names="">Test runner (main)</text:span><text:span text:style-name="a1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1.95in" svg:width="6.4in" svg:height="4.6in" draw:id="id179" draw:style-name="a1805" draw:name="Shape 12">
          <svg:title/>
          <svg:desc/>
          <text:p text:style-name="a1804" text:class-names="" text:cond-style-name=""><text:span text:style-name="a18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6in" svg:y="2.17in" svg:width="5.8in" svg:height="4.2in" draw:id="id180" draw:style-name="a1848" draw:name="Text 13">
          <svg:title/>
          <svg:desc/>
          <text:p text:style-name="a1808" text:class-names="" text:cond-style-name=""><text:span text:style-name="a1806" text:class-names="">#include "unity.h"</text:span><text:span text:style-name="a1807" text:class-names=""/></text:p>
          <text:p text:style-name="a1811" text:class-names="" text:cond-style-name=""><text:span text:style-name="a1809" text:class-names="">#include "math_utils.h"</text:span><text:span text:style-name="a1810" text:class-names=""/></text:p>
          <text:p text:style-name="a1813" text:class-names="" text:cond-style-name=""><text:span text:style-name="a1812" text:class-names=""/></text:p>
          <text:p text:style-name="a1816" text:class-names="" text:cond-style-name=""><text:span text:style-name="a1814" text:class-names="">void setUp(void) <text:s text:c="3"/>{ /* priprema */ }</text:span><text:span text:style-name="a1815" text:class-names=""/></text:p>
          <text:p text:style-name="a1819" text:class-names="" text:cond-style-name=""><text:span text:style-name="a1817" text:class-names="">void tearDown(void) { /* čišćenje */ }</text:span><text:span text:style-name="a1818" text:class-names=""/></text:p>
          <text:p text:style-name="a1821" text:class-names="" text:cond-style-name=""><text:span text:style-name="a1820" text:class-names=""/></text:p>
          <text:p text:style-name="a1824" text:class-names="" text:cond-style-name=""><text:span text:style-name="a1822" text:class-names="">void test_sabiranje_dva_broja(void);</text:span><text:span text:style-name="a1823" text:class-names=""/></text:p>
          <text:p text:style-name="a1827" text:class-names="" text:cond-style-name=""><text:span text:style-name="a1825" text:class-names="">void test_dijeljenje_sa_nulom(void);</text:span><text:span text:style-name="a1826" text:class-names=""/></text:p>
          <text:p text:style-name="a1829" text:class-names="" text:cond-style-name=""><text:span text:style-name="a1828" text:class-names=""/></text:p>
          <text:p text:style-name="a1832" text:class-names="" text:cond-style-name=""><text:span text:style-name="a1830" text:class-names="">int main(void) {</text:span><text:span text:style-name="a1831" text:class-names=""/></text:p>
          <text:p text:style-name="a1835" text:class-names="" text:cond-style-name=""><text:span text:style-name="a1833" text:class-names=""><text:s text:c="4"/>UNITY_BEGIN();</text:span><text:span text:style-name="a1834" text:class-names=""/></text:p>
          <text:p text:style-name="a1838" text:class-names="" text:cond-style-name=""><text:span text:style-name="a1836" text:class-names=""><text:s text:c="4"/>RUN_TEST(test_sabiranje_dva_broja);</text:span><text:span text:style-name="a1837" text:class-names=""/></text:p>
          <text:p text:style-name="a1841" text:class-names="" text:cond-style-name=""><text:span text:style-name="a1839" text:class-names=""><text:s text:c="4"/>RUN_TEST(test_dijeljenje_sa_nulom);</text:span><text:span text:style-name="a1840" text:class-names=""/></text:p>
          <text:p text:style-name="a1844" text:class-names="" text:cond-style-name=""><text:span text:style-name="a1842" text:class-names=""><text:s text:c="4"/>return UNITY_END();</text:span><text:span text:style-name="a1843" text:class-names=""/></text:p>
          <text:p text:style-name="a1847" text:class-names="" text:cond-style-name=""><text:span text:style-name="a1845" text:class-names="">}</text:span><text:span text:style-name="a1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6" draw:style-name="a1849" draw:master-page-name="Master1-Layout4-cust-3_chapter_title" presentation:presentation-page-layout-name="Master1-PPL4" draw:id="Slide-481">
        <draw:frame draw:id="id181" presentation:style-name="a1857" draw:name="Title 1" svg:x="0.61417in" svg:y="0.78346in" svg:width="9.11461in" svg:height="0.52362in" presentation:class="title" presentation:placeholder="false">
          <draw:text-box>
            <text:p text:style-name="a1856" text:class-names="" text:cond-style-name=""><text:span text:style-name="a1850" text:class-names="">Primjer</text:span><text:span text:style-name="a1851" text:class-names=""><text:s text:c="1"/></text:span><text:span text:style-name="a1852" text:class-names="">jednog</text:span><text:span text:style-name="a1853" text:class-names=""><text:s text:c="1"/></text:span><text:span text:style-name="a1854" text:class-names="">testa</text:span><text:span text:style-name="a1855" text:class-names=""/></text:p>
          </draw:text-box>
          <svg:title/>
          <svg:desc/>
        </draw:frame>
        <draw:custom-shape svg:x="0.6in" svg:y="1.75in" svg:width="6.55in" svg:height="4.85in" draw:id="id182" draw:style-name="a1860" draw:name="Shape 2">
          <svg:title/>
          <svg:desc/>
          <text:p text:style-name="a1859" text:class-names="" text:cond-style-name=""><text:span text:style-name="a18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in" svg:y="1.97in" svg:width="5.95in" svg:height="4.45in" draw:id="id183" draw:style-name="a1898" draw:name="Text 3">
          <svg:title/>
          <svg:desc/>
          <text:p text:style-name="a1863" text:class-names="" text:cond-style-name=""><text:span text:style-name="a1861" text:class-names="">// math_utils.c</text:span><text:span text:style-name="a1862" text:class-names=""/></text:p>
          <text:p text:style-name="a1866" text:class-names="" text:cond-style-name=""><text:span text:style-name="a1864" text:class-names="">int zbir(int a, int b) {</text:span><text:span text:style-name="a1865" text:class-names=""/></text:p>
          <text:p text:style-name="a1869" text:class-names="" text:cond-style-name=""><text:span text:style-name="a1867" text:class-names=""><text:s text:c="4"/>return a + b;</text:span><text:span text:style-name="a1868" text:class-names=""/></text:p>
          <text:p text:style-name="a1872" text:class-names="" text:cond-style-name=""><text:span text:style-name="a1870" text:class-names="">}</text:span><text:span text:style-name="a1871" text:class-names=""/></text:p>
          <text:p text:style-name="a1874" text:class-names="" text:cond-style-name=""><text:span text:style-name="a1873" text:class-names=""/></text:p>
          <text:p text:style-name="a1877" text:class-names="" text:cond-style-name=""><text:span text:style-name="a1875" text:class-names="">// test_math_utils.c</text:span><text:span text:style-name="a1876" text:class-names=""/></text:p>
          <text:p text:style-name="a1880" text:class-names="" text:cond-style-name=""><text:span text:style-name="a1878" text:class-names="">#include "unity.h"</text:span><text:span text:style-name="a1879" text:class-names=""/></text:p>
          <text:p text:style-name="a1883" text:class-names="" text:cond-style-name=""><text:span text:style-name="a1881" text:class-names="">#include "math_utils.h"</text:span><text:span text:style-name="a1882" text:class-names=""/></text:p>
          <text:p text:style-name="a1885" text:class-names="" text:cond-style-name=""><text:span text:style-name="a1884" text:class-names=""/></text:p>
          <text:p text:style-name="a1888" text:class-names="" text:cond-style-name=""><text:span text:style-name="a1886" text:class-names="">void test_sabiranje_dva_broja(void) {</text:span><text:span text:style-name="a1887" text:class-names=""/></text:p>
          <text:p text:style-name="a1891" text:class-names="" text:cond-style-name=""><text:span text:style-name="a1889" text:class-names=""><text:s text:c="4"/>int rezultat = zbir(2, 3);</text:span><text:span text:style-name="a1890" text:class-names=""/></text:p>
          <text:p text:style-name="a1894" text:class-names="" text:cond-style-name=""><text:span text:style-name="a1892" text:class-names=""><text:s text:c="4"/>TEST_ASSERT_EQUAL_INT(5, rezultat);</text:span><text:span text:style-name="a1893" text:class-names=""/></text:p>
          <text:p text:style-name="a1897" text:class-names="" text:cond-style-name=""><text:span text:style-name="a1895" text:class-names="">}</text:span><text:span text:style-name="a1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5in" svg:y="1.85in" svg:width="5.3in" svg:height="1.25in" draw:id="id184" draw:style-name="a1901" draw:name="Shape 4">
          <svg:title/>
          <svg:desc/>
          <text:p text:style-name="a1900" text:class-names="" text:cond-style-name=""><text:span text:style-name="a18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7in" svg:y="2.13in" svg:width="0.7in" svg:height="0.7in" draw:id="id185" draw:style-name="a1904" draw:name="Shape 5">
          <svg:title/>
          <svg:desc/>
          <text:p text:style-name="a1903" text:class-names="" text:cond-style-name=""><text:span text:style-name="a19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in" svg:y="2.13in" svg:width="0.7in" svg:height="0.7in" draw:id="id186" draw:style-name="a1908" draw:name="Text 6">
          <svg:title/>
          <svg:desc/>
          <text:p text:style-name="a1907" text:class-names="" text:cond-style-name=""><text:span text:style-name="a1905" text:class-names="">1</text:span><text:span text:style-name="a1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in" svg:y="1.99in" svg:width="4in" svg:height="0.4in" draw:id="id187" draw:style-name="a1912" draw:name="Text 7">
          <svg:title/>
          <svg:desc/>
          <text:p text:style-name="a1911" text:class-names="" text:cond-style-name=""><text:span text:style-name="a1909" text:class-names="">Arrange</text:span><text:span text:style-name="a1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in" svg:y="2.4in" svg:width="4.05in" svg:height="0.6in" draw:id="id188" draw:style-name="a1916" draw:name="Text 8">
          <svg:title/>
          <svg:desc/>
          <text:p text:style-name="a1915" text:class-names="" text:cond-style-name=""><text:span text:style-name="a1913" text:class-names="">Pripremi ulazne podatke i očekivano stanje.</text:span><text:span text:style-name="a1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5in" svg:y="3.35in" svg:width="5.3in" svg:height="1.25in" draw:id="id189" draw:style-name="a1919" draw:name="Shape 9">
          <svg:title/>
          <svg:desc/>
          <text:p text:style-name="a1918" text:class-names="" text:cond-style-name=""><text:span text:style-name="a19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7in" svg:y="3.63in" svg:width="0.7in" svg:height="0.7in" draw:id="id190" draw:style-name="a1922" draw:name="Shape 10">
          <svg:title/>
          <svg:desc/>
          <text:p text:style-name="a1921" text:class-names="" text:cond-style-name=""><text:span text:style-name="a19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in" svg:y="3.63in" svg:width="0.7in" svg:height="0.7in" draw:id="id191" draw:style-name="a1926" draw:name="Text 11">
          <svg:title/>
          <svg:desc/>
          <text:p text:style-name="a1925" text:class-names="" text:cond-style-name=""><text:span text:style-name="a1923" text:class-names="">2</text:span><text:span text:style-name="a1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in" svg:y="3.49in" svg:width="4in" svg:height="0.4in" draw:id="id192" draw:style-name="a1930" draw:name="Text 12">
          <svg:title/>
          <svg:desc/>
          <text:p text:style-name="a1929" text:class-names="" text:cond-style-name=""><text:span text:style-name="a1927" text:class-names="">Act</text:span><text:span text:style-name="a1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in" svg:y="3.9in" svg:width="4.05in" svg:height="0.6in" draw:id="id193" draw:style-name="a1934" draw:name="Text 13">
          <svg:title/>
          <svg:desc/>
          <text:p text:style-name="a1933" text:class-names="" text:cond-style-name=""><text:span text:style-name="a1931" text:class-names="">Pozovi funkciju koja se testira (zbir(2, 3)).</text:span><text:span text:style-name="a1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5in" svg:y="4.85in" svg:width="5.3in" svg:height="1.25in" draw:id="id194" draw:style-name="a1937" draw:name="Shape 14">
          <svg:title/>
          <svg:desc/>
          <text:p text:style-name="a1936" text:class-names="" text:cond-style-name=""><text:span text:style-name="a19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7in" svg:y="5.13in" svg:width="0.7in" svg:height="0.7in" draw:id="id195" draw:style-name="a1940" draw:name="Shape 15">
          <svg:title/>
          <svg:desc/>
          <text:p text:style-name="a1939" text:class-names="" text:cond-style-name=""><text:span text:style-name="a19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in" svg:y="5.13in" svg:width="0.7in" svg:height="0.7in" draw:id="id196" draw:style-name="a1944" draw:name="Text 16">
          <svg:title/>
          <svg:desc/>
          <text:p text:style-name="a1943" text:class-names="" text:cond-style-name=""><text:span text:style-name="a1941" text:class-names="">3</text:span><text:span text:style-name="a1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in" svg:y="4.99in" svg:width="4in" svg:height="0.4in" draw:id="id197" draw:style-name="a1948" draw:name="Text 17">
          <svg:title/>
          <svg:desc/>
          <text:p text:style-name="a1947" text:class-names="" text:cond-style-name=""><text:span text:style-name="a1945" text:class-names="">Assert</text:span><text:span text:style-name="a1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in" svg:y="5.4in" svg:width="4.05in" svg:height="0.6in" draw:id="id198" draw:style-name="a1952" draw:name="Text 18">
          <svg:title/>
          <svg:desc/>
          <text:p text:style-name="a1951" text:class-names="" text:cond-style-name=""><text:span text:style-name="a1949" text:class-names="">Uporedi stvarni i očekivani rezultat Unity makroom.</text:span><text:span text:style-name="a1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55">
          <draw:frame draw:id="id199" presentation:style-name="a1953" draw:name="Google Shape;88;p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0.41667in" svg:y="0.75in" svg:width="6.66667in" svg:height="3.75in" presentation:class="page" draw:id="id200" presentation:style-name="a1954" draw:name="Google Shape;89;p1:notes">
            <svg:title/>
            <svg:desc/>
          </draw:page-thumbnail>
        </presentation:notes>
      </draw:page>
      <draw:page draw:name="Slide231" draw:style-name="a1956" draw:master-page-name="Master1-Layout6-cust-6_two_columns_wide_picture-A" presentation:presentation-page-layout-name="Master1-PPL6" draw:id="Slide-486">
        <draw:frame draw:id="id201" presentation:style-name="a1962" draw:name="Title 9" svg:x="0.61417in" svg:y="0.78346in" svg:width="9.11461in" svg:height="0.52362in" presentation:class="title" presentation:placeholder="false">
          <draw:text-box>
            <text:p text:style-name="a1961" text:class-names="" text:cond-style-name=""><text:span text:style-name="a1957" text:class-names="">Osnovni</text:span><text:span text:style-name="a1958" text:class-names=""><text:s text:c="1"/>unity<text:s text:c="1"/></text:span><text:span text:style-name="a1959" text:class-names="">makroi</text:span><text:span text:style-name="a1960" text:class-names=""/></text:p>
          </draw:text-box>
          <svg:title/>
          <svg:desc/>
        </draw:frame>
        <draw:custom-shape svg:x="0.6in" svg:y="1.7in" svg:width="12.1in" svg:height="0.53in" draw:id="id202" draw:style-name="a1965" draw:name="Shape 2">
          <svg:title/>
          <svg:desc/>
          <text:p text:style-name="a1964" text:class-names="" text:cond-style-name=""><text:span text:style-name="a19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1.7in" svg:width="0.06in" svg:height="0.53in" draw:id="id203" draw:style-name="a1968" draw:name="Shape 3">
          <svg:title/>
          <svg:desc/>
          <text:p text:style-name="a1967" text:class-names="" text:cond-style-name=""><text:span text:style-name="a1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1.7in" svg:width="5.024in" svg:height="0.53in" draw:id="id204" draw:style-name="a1972" draw:name="Text 4">
          <svg:title/>
          <svg:desc/>
          <text:p text:style-name="a1971" text:class-names="" text:cond-style-name=""><text:span text:style-name="a1969" text:class-names="">TEST_ASSERT_TRUE(cond)</text:span><text:span text:style-name="a1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1.7in" svg:width="6.576in" svg:height="0.53in" draw:id="id205" draw:style-name="a1976" draw:name="Text 5">
          <svg:title/>
          <svg:desc/>
          <text:p text:style-name="a1975" text:class-names="" text:cond-style-name=""><text:span text:style-name="a1973" text:class-names="">Uspješan test ako je izraz istinit (true)</text:span><text:span text:style-name="a1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23in" svg:width="12.1in" svg:height="0.53in" draw:id="id206" draw:style-name="a1979" draw:name="Shape 6">
          <svg:title/>
          <svg:desc/>
          <text:p text:style-name="a1978" text:class-names="" text:cond-style-name=""><text:span text:style-name="a1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23in" svg:width="0.06in" svg:height="0.53in" draw:id="id207" draw:style-name="a1982" draw:name="Shape 7">
          <svg:title/>
          <svg:desc/>
          <text:p text:style-name="a1981" text:class-names="" text:cond-style-name=""><text:span text:style-name="a1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2.23in" svg:width="5.024in" svg:height="0.53in" draw:id="id208" draw:style-name="a1986" draw:name="Text 8">
          <svg:title/>
          <svg:desc/>
          <text:p text:style-name="a1985" text:class-names="" text:cond-style-name=""><text:span text:style-name="a1983" text:class-names="">TEST_ASSERT_FALSE(cond)</text:span><text:span text:style-name="a1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2.23in" svg:width="6.576in" svg:height="0.53in" draw:id="id209" draw:style-name="a1990" draw:name="Text 9">
          <svg:title/>
          <svg:desc/>
          <text:p text:style-name="a1989" text:class-names="" text:cond-style-name=""><text:span text:style-name="a1987" text:class-names="">Uspješan test ako je izraz neistinit (false)</text:span><text:span text:style-name="a1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76in" svg:width="12.1in" svg:height="0.53in" draw:id="id210" draw:style-name="a1993" draw:name="Shape 10">
          <svg:title/>
          <svg:desc/>
          <text:p text:style-name="a1992" text:class-names="" text:cond-style-name=""><text:span text:style-name="a1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76in" svg:width="0.06in" svg:height="0.53in" draw:id="id211" draw:style-name="a1996" draw:name="Shape 11">
          <svg:title/>
          <svg:desc/>
          <text:p text:style-name="a1995" text:class-names="" text:cond-style-name=""><text:span text:style-name="a19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2.76in" svg:width="5.024in" svg:height="0.53in" draw:id="id212" draw:style-name="a2000" draw:name="Text 12">
          <svg:title/>
          <svg:desc/>
          <text:p text:style-name="a1999" text:class-names="" text:cond-style-name=""><text:span text:style-name="a1997" text:class-names="">TEST_ASSERT_EQUAL(a, b)</text:span><text:span text:style-name="a1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2.76in" svg:width="6.576in" svg:height="0.53in" draw:id="id213" draw:style-name="a2004" draw:name="Text 13">
          <svg:title/>
          <svg:desc/>
          <text:p text:style-name="a2003" text:class-names="" text:cond-style-name=""><text:span text:style-name="a2001" text:class-names="">Generička provjera jednakosti a == b</text:span><text:span text:style-name="a2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29in" svg:width="12.1in" svg:height="0.53in" draw:id="id214" draw:style-name="a2007" draw:name="Shape 14">
          <svg:title/>
          <svg:desc/>
          <text:p text:style-name="a2006" text:class-names="" text:cond-style-name=""><text:span text:style-name="a2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29in" svg:width="0.06in" svg:height="0.53in" draw:id="id215" draw:style-name="a2010" draw:name="Shape 15">
          <svg:title/>
          <svg:desc/>
          <text:p text:style-name="a2009" text:class-names="" text:cond-style-name=""><text:span text:style-name="a2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3.29in" svg:width="5.024in" svg:height="0.53in" draw:id="id216" draw:style-name="a2014" draw:name="Text 16">
          <svg:title/>
          <svg:desc/>
          <text:p text:style-name="a2013" text:class-names="" text:cond-style-name=""><text:span text:style-name="a2011" text:class-names="">TEST_ASSERT_EQUAL_INT(a, b)</text:span><text:span text:style-name="a2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3.29in" svg:width="6.576in" svg:height="0.53in" draw:id="id217" draw:style-name="a2018" draw:name="Text 17">
          <svg:title/>
          <svg:desc/>
          <text:p text:style-name="a2017" text:class-names="" text:cond-style-name=""><text:span text:style-name="a2015" text:class-names="">Poređenje cjelobrojnih (int) vrijednosti</text:span><text:span text:style-name="a2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82in" svg:width="12.1in" svg:height="0.53in" draw:id="id218" draw:style-name="a2021" draw:name="Shape 18">
          <svg:title/>
          <svg:desc/>
          <text:p text:style-name="a2020" text:class-names="" text:cond-style-name=""><text:span text:style-name="a2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82in" svg:width="0.06in" svg:height="0.53in" draw:id="id219" draw:style-name="a2024" draw:name="Shape 19">
          <svg:title/>
          <svg:desc/>
          <text:p text:style-name="a2023" text:class-names="" text:cond-style-name=""><text:span text:style-name="a2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3.82in" svg:width="5.024in" svg:height="0.53in" draw:id="id220" draw:style-name="a2028" draw:name="Text 20">
          <svg:title/>
          <svg:desc/>
          <text:p text:style-name="a2027" text:class-names="" text:cond-style-name=""><text:span text:style-name="a2025" text:class-names="">TEST_ASSERT_EQUAL_UINT(a, b)</text:span><text:span text:style-name="a2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3.82in" svg:width="6.576in" svg:height="0.53in" draw:id="id221" draw:style-name="a2032" draw:name="Text 21">
          <svg:title/>
          <svg:desc/>
          <text:p text:style-name="a2031" text:class-names="" text:cond-style-name=""><text:span text:style-name="a2029" text:class-names="">Poređenje unsigned int vrijednosti</text:span><text:span text:style-name="a20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35in" svg:width="12.1in" svg:height="0.53in" draw:id="id222" draw:style-name="a2035" draw:name="Shape 22">
          <svg:title/>
          <svg:desc/>
          <text:p text:style-name="a2034" text:class-names="" text:cond-style-name=""><text:span text:style-name="a2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35in" svg:width="0.06in" svg:height="0.53in" draw:id="id223" draw:style-name="a2038" draw:name="Shape 23">
          <svg:title/>
          <svg:desc/>
          <text:p text:style-name="a2037" text:class-names="" text:cond-style-name=""><text:span text:style-name="a2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4.35in" svg:width="5.024in" svg:height="0.53in" draw:id="id224" draw:style-name="a2042" draw:name="Text 24">
          <svg:title/>
          <svg:desc/>
          <text:p text:style-name="a2041" text:class-names="" text:cond-style-name=""><text:span text:style-name="a2039" text:class-names="">TEST_ASSERT_NOT_EQUAL(a, b)</text:span><text:span text:style-name="a2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4.35in" svg:width="6.576in" svg:height="0.53in" draw:id="id225" draw:style-name="a2046" draw:name="Text 25">
          <svg:title/>
          <svg:desc/>
          <text:p text:style-name="a2045" text:class-names="" text:cond-style-name=""><text:span text:style-name="a2043" text:class-names="">Prolazi ako vrijednosti nisu jednake</text:span><text:span text:style-name="a20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88in" svg:width="12.1in" svg:height="0.53in" draw:id="id226" draw:style-name="a2049" draw:name="Shape 26">
          <svg:title/>
          <svg:desc/>
          <text:p text:style-name="a2048" text:class-names="" text:cond-style-name=""><text:span text:style-name="a2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88in" svg:width="0.06in" svg:height="0.53in" draw:id="id227" draw:style-name="a2052" draw:name="Shape 27">
          <svg:title/>
          <svg:desc/>
          <text:p text:style-name="a2051" text:class-names="" text:cond-style-name=""><text:span text:style-name="a2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4.88in" svg:width="5.024in" svg:height="0.53in" draw:id="id228" draw:style-name="a2056" draw:name="Text 28">
          <svg:title/>
          <svg:desc/>
          <text:p text:style-name="a2055" text:class-names="" text:cond-style-name=""><text:span text:style-name="a2053" text:class-names="">TEST_ASSERT_NULL(ptr)</text:span><text:span text:style-name="a2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4.88in" svg:width="6.576in" svg:height="0.53in" draw:id="id229" draw:style-name="a2060" draw:name="Text 29">
          <svg:title/>
          <svg:desc/>
          <text:p text:style-name="a2059" text:class-names="" text:cond-style-name=""><text:span text:style-name="a2057" text:class-names="">Provjerava da je pokazivač NULL</text:span><text:span text:style-name="a2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5.41in" svg:width="12.1in" svg:height="0.53in" draw:id="id230" draw:style-name="a2063" draw:name="Shape 30">
          <svg:title/>
          <svg:desc/>
          <text:p text:style-name="a2062" text:class-names="" text:cond-style-name=""><text:span text:style-name="a2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5.41in" svg:width="0.06in" svg:height="0.53in" draw:id="id231" draw:style-name="a2066" draw:name="Shape 31">
          <svg:title/>
          <svg:desc/>
          <text:p text:style-name="a2065" text:class-names="" text:cond-style-name=""><text:span text:style-name="a2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5.41in" svg:width="5.024in" svg:height="0.53in" draw:id="id232" draw:style-name="a2070" draw:name="Text 32">
          <svg:title/>
          <svg:desc/>
          <text:p text:style-name="a2069" text:class-names="" text:cond-style-name=""><text:span text:style-name="a2067" text:class-names="">TEST_ASSERT_NOT_NULL(ptr)</text:span><text:span text:style-name="a2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5.41in" svg:width="6.576in" svg:height="0.53in" draw:id="id233" draw:style-name="a2074" draw:name="Text 33">
          <svg:title/>
          <svg:desc/>
          <text:p text:style-name="a2073" text:class-names="" text:cond-style-name=""><text:span text:style-name="a2071" text:class-names="">Provjerava da pokazivač nije NULL</text:span><text:span text:style-name="a2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47471436" draw:style-name="a2075" draw:master-page-name="Master1-Layout6-cust-6_two_columns_wide_picture-A" presentation:presentation-page-layout-name="Master1-PPL6" draw:id="Slide-2147471691">
        <draw:frame draw:id="id234" presentation:style-name="a2081" draw:name="Title 9" svg:x="0.61417in" svg:y="0.78346in" svg:width="9.11461in" svg:height="0.52362in" presentation:class="title" presentation:placeholder="false">
          <draw:text-box>
            <text:p text:style-name="a2080" text:class-names="" text:cond-style-name=""><text:span text:style-name="a2076" text:class-names="">Osnovni</text:span><text:span text:style-name="a2077" text:class-names=""><text:s text:c="1"/>unity<text:s text:c="1"/></text:span><text:span text:style-name="a2078" text:class-names="">makroi</text:span><text:span text:style-name="a2079" text:class-names=""/></text:p>
          </draw:text-box>
          <svg:title/>
          <svg:desc/>
        </draw:frame>
        <draw:custom-shape svg:x="0.6in" svg:y="1.7in" svg:width="12.1in" svg:height="0.53in" draw:id="id235" draw:style-name="a2084" draw:name="Shape 2">
          <svg:title/>
          <svg:desc/>
          <text:p text:style-name="a2083" text:class-names="" text:cond-style-name=""><text:span text:style-name="a2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1.7in" svg:width="0.06in" svg:height="0.53in" draw:id="id236" draw:style-name="a2087" draw:name="Shape 3">
          <svg:title/>
          <svg:desc/>
          <text:p text:style-name="a2086" text:class-names="" text:cond-style-name=""><text:span text:style-name="a2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1.7in" svg:width="5.024in" svg:height="0.53in" draw:id="id237" draw:style-name="a2091" draw:name="Text 4">
          <svg:title/>
          <svg:desc/>
          <text:p text:style-name="a2090" text:class-names="" text:cond-style-name=""><text:span text:style-name="a2088" text:class-names="">TEST_ASSERT_EQUAL_STRING(a, b)</text:span><text:span text:style-name="a2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1.7in" svg:width="6.576in" svg:height="0.53in" draw:id="id238" draw:style-name="a2095" draw:name="Text 5">
          <svg:title/>
          <svg:desc/>
          <text:p text:style-name="a2094" text:class-names="" text:cond-style-name=""><text:span text:style-name="a2092" text:class-names="">Poređenje C stringova (char*) karakter po karakter</text:span><text:span text:style-name="a2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23in" svg:width="12.1in" svg:height="0.53in" draw:id="id239" draw:style-name="a2098" draw:name="Shape 6">
          <svg:title/>
          <svg:desc/>
          <text:p text:style-name="a2097" text:class-names="" text:cond-style-name=""><text:span text:style-name="a2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23in" svg:width="0.06in" svg:height="0.53in" draw:id="id240" draw:style-name="a2101" draw:name="Shape 7">
          <svg:title/>
          <svg:desc/>
          <text:p text:style-name="a2100" text:class-names="" text:cond-style-name=""><text:span text:style-name="a2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2.23in" svg:width="5.024in" svg:height="0.53in" draw:id="id241" draw:style-name="a2105" draw:name="Text 8">
          <svg:title/>
          <svg:desc/>
          <text:p text:style-name="a2104" text:class-names="" text:cond-style-name=""><text:span text:style-name="a2102" text:class-names="">TEST_ASSERT_EQUAL_FLOAT(a, b)</text:span><text:span text:style-name="a2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2.23in" svg:width="6.576in" svg:height="0.53in" draw:id="id242" draw:style-name="a2109" draw:name="Text 9">
          <svg:title/>
          <svg:desc/>
          <text:p text:style-name="a2108" text:class-names="" text:cond-style-name=""><text:span text:style-name="a2106" text:class-names="">Poređenje float vrijednosti s tolerancijom</text:span><text:span text:style-name="a2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76in" svg:width="12.1in" svg:height="0.53in" draw:id="id243" draw:style-name="a2112" draw:name="Shape 10">
          <svg:title/>
          <svg:desc/>
          <text:p text:style-name="a2111" text:class-names="" text:cond-style-name=""><text:span text:style-name="a2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76in" svg:width="0.06in" svg:height="0.53in" draw:id="id244" draw:style-name="a2115" draw:name="Shape 11">
          <svg:title/>
          <svg:desc/>
          <text:p text:style-name="a2114" text:class-names="" text:cond-style-name=""><text:span text:style-name="a2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2.76in" svg:width="5.024in" svg:height="0.53in" draw:id="id245" draw:style-name="a2119" draw:name="Text 12">
          <svg:title/>
          <svg:desc/>
          <text:p text:style-name="a2118" text:class-names="" text:cond-style-name=""><text:span text:style-name="a2116" text:class-names="">TEST_ASSERT_EQUAL_DOUBLE(a, b)</text:span><text:span text:style-name="a2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2.76in" svg:width="6.576in" svg:height="0.53in" draw:id="id246" draw:style-name="a2123" draw:name="Text 13">
          <svg:title/>
          <svg:desc/>
          <text:p text:style-name="a2122" text:class-names="" text:cond-style-name=""><text:span text:style-name="a2120" text:class-names="">Poređenje double vrijednosti s tolerancijom</text:span><text:span text:style-name="a2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29in" svg:width="12.1in" svg:height="0.53in" draw:id="id247" draw:style-name="a2126" draw:name="Shape 14">
          <svg:title/>
          <svg:desc/>
          <text:p text:style-name="a2125" text:class-names="" text:cond-style-name=""><text:span text:style-name="a2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29in" svg:width="0.06in" svg:height="0.53in" draw:id="id248" draw:style-name="a2129" draw:name="Shape 15">
          <svg:title/>
          <svg:desc/>
          <text:p text:style-name="a2128" text:class-names="" text:cond-style-name=""><text:span text:style-name="a2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3.29in" svg:width="5.024in" svg:height="0.53in" draw:id="id249" draw:style-name="a2133" draw:name="Text 16">
          <svg:title/>
          <svg:desc/>
          <text:p text:style-name="a2132" text:class-names="" text:cond-style-name=""><text:span text:style-name="a2130" text:class-names="">TEST_ASSERT_EQUAL_INT_ARRAY(a,b,n)</text:span><text:span text:style-name="a2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3.29in" svg:width="6.576in" svg:height="0.53in" draw:id="id250" draw:style-name="a2137" draw:name="Text 17">
          <svg:title/>
          <svg:desc/>
          <text:p text:style-name="a2136" text:class-names="" text:cond-style-name=""><text:span text:style-name="a2134" text:class-names="">Poređenje niza od n int elemenata</text:span><text:span text:style-name="a2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82in" svg:width="12.1in" svg:height="0.53in" draw:id="id251" draw:style-name="a2140" draw:name="Shape 18">
          <svg:title/>
          <svg:desc/>
          <text:p text:style-name="a2139" text:class-names="" text:cond-style-name=""><text:span text:style-name="a2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82in" svg:width="0.06in" svg:height="0.53in" draw:id="id252" draw:style-name="a2143" draw:name="Shape 19">
          <svg:title/>
          <svg:desc/>
          <text:p text:style-name="a2142" text:class-names="" text:cond-style-name=""><text:span text:style-name="a2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3.82in" svg:width="5.024in" svg:height="0.53in" draw:id="id253" draw:style-name="a2147" draw:name="Text 20">
          <svg:title/>
          <svg:desc/>
          <text:p text:style-name="a2146" text:class-names="" text:cond-style-name=""><text:span text:style-name="a2144" text:class-names="">TEST_ASSERT_EQUAL_MEMORY(a,b,n)</text:span><text:span text:style-name="a2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3.82in" svg:width="6.576in" svg:height="0.53in" draw:id="id254" draw:style-name="a2151" draw:name="Text 21">
          <svg:title/>
          <svg:desc/>
          <text:p text:style-name="a2150" text:class-names="" text:cond-style-name=""><text:span text:style-name="a2148" text:class-names="">Bajt-po-bajt poređenje bloka memorije</text:span><text:span text:style-name="a2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35in" svg:width="12.1in" svg:height="0.53in" draw:id="id255" draw:style-name="a2154" draw:name="Shape 22">
          <svg:title/>
          <svg:desc/>
          <text:p text:style-name="a2153" text:class-names="" text:cond-style-name=""><text:span text:style-name="a2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35in" svg:width="0.06in" svg:height="0.53in" draw:id="id256" draw:style-name="a2157" draw:name="Shape 23">
          <svg:title/>
          <svg:desc/>
          <text:p text:style-name="a2156" text:class-names="" text:cond-style-name=""><text:span text:style-name="a2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4.35in" svg:width="5.024in" svg:height="0.53in" draw:id="id257" draw:style-name="a2161" draw:name="Text 24">
          <svg:title/>
          <svg:desc/>
          <text:p text:style-name="a2160" text:class-names="" text:cond-style-name=""><text:span text:style-name="a2158" text:class-names="">TEST_ASSERT_WITHIN(delta, exp, act)</text:span><text:span text:style-name="a2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4.35in" svg:width="6.576in" svg:height="0.53in" draw:id="id258" draw:style-name="a2165" draw:name="Text 25">
          <svg:title/>
          <svg:desc/>
          <text:p text:style-name="a2164" text:class-names="" text:cond-style-name=""><text:span text:style-name="a2162" text:class-names="">Provjerava da je vrijednost unutar dozvoljenog odstupanja</text:span><text:span text:style-name="a21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88in" svg:width="12.1in" svg:height="0.53in" draw:id="id259" draw:style-name="a2168" draw:name="Shape 26">
          <svg:title/>
          <svg:desc/>
          <text:p text:style-name="a2167" text:class-names="" text:cond-style-name=""><text:span text:style-name="a2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88in" svg:width="0.06in" svg:height="0.53in" draw:id="id260" draw:style-name="a2171" draw:name="Shape 27">
          <svg:title/>
          <svg:desc/>
          <text:p text:style-name="a2170" text:class-names="" text:cond-style-name=""><text:span text:style-name="a2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4.88in" svg:width="5.024in" svg:height="0.53in" draw:id="id261" draw:style-name="a2175" draw:name="Text 28">
          <svg:title/>
          <svg:desc/>
          <text:p text:style-name="a2174" text:class-names="" text:cond-style-name=""><text:span text:style-name="a2172" text:class-names="">TEST_FAIL_MESSAGE("poruka")</text:span><text:span text:style-name="a2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4.88in" svg:width="6.576in" svg:height="0.53in" draw:id="id262" draw:style-name="a2179" draw:name="Text 29">
          <svg:title/>
          <svg:desc/>
          <text:p text:style-name="a2178" text:class-names="" text:cond-style-name=""><text:span text:style-name="a2176" text:class-names="">Odmah označava test neuspjelim, s porukom</text:span><text:span text:style-name="a2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5.41in" svg:width="12.1in" svg:height="0.53in" draw:id="id263" draw:style-name="a2182" draw:name="Shape 30">
          <svg:title/>
          <svg:desc/>
          <text:p text:style-name="a2181" text:class-names="" text:cond-style-name=""><text:span text:style-name="a21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5.41in" svg:width="0.06in" svg:height="0.53in" draw:id="id264" draw:style-name="a2185" draw:name="Shape 31">
          <svg:title/>
          <svg:desc/>
          <text:p text:style-name="a2184" text:class-names="" text:cond-style-name=""><text:span text:style-name="a2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5.41in" svg:width="5.024in" svg:height="0.53in" draw:id="id265" draw:style-name="a2189" draw:name="Text 32">
          <svg:title/>
          <svg:desc/>
          <text:p text:style-name="a2188" text:class-names="" text:cond-style-name=""><text:span text:style-name="a2186" text:class-names="">TEST_IGNORE_MESSAGE("razlog")</text:span><text:span text:style-name="a2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in" svg:y="5.41in" svg:width="6.576in" svg:height="0.53in" draw:id="id266" draw:style-name="a2193" draw:name="Text 33">
          <svg:title/>
          <svg:desc/>
          <text:p text:style-name="a2192" text:class-names="" text:cond-style-name=""><text:span text:style-name="a2190" text:class-names="">Preskače test i bilježi ga kao IGNORED</text:span><text:span text:style-name="a2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47471437" draw:style-name="a2194" draw:master-page-name="Master1-Layout19-cust-section-title" presentation:presentation-page-layout-name="Master1-PPL19" draw:id="Slide-2147471692">
        <draw:frame draw:id="id267" presentation:style-name="a2201" draw:name="Title 1" svg:x="3.98306in" svg:y="3.86353in" svg:width="9.11461in" svg:height="0.52362in" presentation:class="title" presentation:placeholder="false">
          <draw:text-box>
            <text:p text:style-name="a2200" text:class-names="" text:cond-style-name=""><text:span text:style-name="a2195" text:class-names="">3.<text:s text:c="1"/></text:span><text:span text:style-name="a2196" text:class-names="">Pokrivenost</text:span><text:span text:style-name="a2197" text:class-names=""><text:s text:c="1"/></text:span><text:span text:style-name="a2198" text:class-names="">koda</text:span><text:span text:style-name="a2199" text:class-names=""/></text:p>
          </draw:text-box>
          <svg:title/>
          <svg:desc/>
        </draw:frame>
      </draw:page>
      <draw:page draw:name="Slide2147471438" draw:style-name="a2202" draw:master-page-name="Master1-Layout10-cust-10_one_column" presentation:presentation-page-layout-name="Master1-PPL10" draw:id="Slide-2147471693">
        <draw:frame draw:id="id268" presentation:style-name="a2209" draw:name="Title 1" svg:x="0.61417in" svg:y="0.78346in" svg:width="9.11461in" svg:height="0.52362in" presentation:class="title" presentation:placeholder="false">
          <draw:text-box>
            <text:p text:style-name="a2208" text:class-names="" text:cond-style-name=""><text:span text:style-name="a2203" text:class-names="">Sta je<text:s text:c="1"/></text:span><text:span text:style-name="a2204" text:class-names="">pokrivenost</text:span><text:span text:style-name="a2205" text:class-names=""><text:s text:c="1"/></text:span><text:span text:style-name="a2206" text:class-names="">koda</text:span><text:span text:style-name="a2207" text:class-names=""/></text:p>
          </draw:text-box>
          <svg:title/>
          <svg:desc/>
        </draw:frame>
        <draw:frame draw:id="id269" presentation:style-name="a2317" draw:name="Text Placeholder 2" svg:x="0.61417in" svg:y="1.64286in" svg:width="12.10458in" svg:height="5.18572in" presentation:class="outline" presentation:placeholder="false">
          <draw:text-box>
            <text:list text:style-name="a2231">
              <text:list-item>
                <text:p text:style-name="a2230" text:class-names="" text:cond-style-name=""><text:span text:style-name="a2210" text:class-names="">Pokrivenost</text:span><text:span text:style-name="a2211" text:class-names=""><text:s text:c="1"/></text:span><text:span text:style-name="a2212" text:class-names="">koda</text:span><text:span text:style-name="a2213" text:class-names=""><text:s text:c="1"/>(Code Coverage)<text:s text:c="1"/></text:span><text:span text:style-name="a2214" text:class-names="">predstavlja</text:span><text:span text:style-name="a2215" text:class-names=""><text:s text:c="1"/></text:span><text:span text:style-name="a2216" text:class-names="">procenat</text:span><text:span text:style-name="a2217" text:class-names=""><text:s text:c="1"/></text:span><text:span text:style-name="a2218" text:class-names="">izvornog</text:span><text:span text:style-name="a2219" text:class-names=""><text:s text:c="1"/></text:span><text:span text:style-name="a2220" text:class-names="">koda</text:span><text:span text:style-name="a2221" text:class-names=""><text:s text:c="1"/>koji je<text:s text:c="1"/></text:span><text:span text:style-name="a2222" text:class-names="">izvrsen</text:span><text:span text:style-name="a2223" text:class-names=""><text:s text:c="1"/></text:span><text:span text:style-name="a2224" text:class-names="">tokom</text:span><text:span text:style-name="a2225" text:class-names=""><text:s text:c="1"/></text:span><text:span text:style-name="a2226" text:class-names="">izvodjenja</text:span><text:span text:style-name="a2227" text:class-names=""><text:s text:c="1"/></text:span><text:span text:style-name="a2228" text:class-names="">testova</text:span><text:span text:style-name="a2229" text:class-names="">.<text:s text:c="1"/></text:span></text:p>
              </text:list-item>
            </text:list>
            <text:list text:style-name="a2259">
              <text:list-item>
                <text:p text:style-name="a2258" text:class-names="" text:cond-style-name=""><text:span text:style-name="a2232" text:class-names="">Glavni</text:span><text:span text:style-name="a2233" text:class-names=""><text:s text:c="1"/></text:span><text:span text:style-name="a2234" text:class-names="">cilj</text:span><text:span text:style-name="a2235" text:class-names=""><text:s text:c="1"/>je<text:s text:c="1"/></text:span><text:span text:style-name="a2236" text:class-names="">identifkovati</text:span><text:span text:style-name="a2237" text:class-names=""><text:s text:c="1"/></text:span><text:span text:style-name="a2238" text:class-names="">netestirane</text:span><text:span text:style-name="a2239" text:class-names=""><text:s text:c="1"/></text:span><text:span text:style-name="a2240" text:class-names="">grane</text:span><text:span text:style-name="a2241" text:class-names="">, “</text:span><text:span text:style-name="a2242" text:class-names="">mrtve</text:span><text:span text:style-name="a2243" text:class-names="">”</text:span><text:span text:style-name="a2244" text:class-names=""><text:s text:c="1"/></text:span><text:span text:style-name="a2245" text:class-names="">dijelove</text:span><text:span text:style-name="a2246" text:class-names=""><text:s text:c="1"/></text:span><text:span text:style-name="a2247" text:class-names="">koda</text:span><text:span text:style-name="a2248" text:class-names=""><text:s text:c="1"/></text:span><text:span text:style-name="a2249" text:class-names="">ili</text:span><text:span text:style-name="a2250" text:class-names=""><text:s text:c="1"/></text:span><text:span text:style-name="a2251" text:class-names="">propuste</text:span><text:span text:style-name="a2252" text:class-names=""><text:s text:c="1"/></text:span><text:span text:style-name="a2253" text:class-names="">u</text:span><text:span text:style-name="a2254" text:class-names=""><text:s text:c="1"/></text:span><text:span text:style-name="a2255" text:class-names="">logici</text:span><text:span text:style-name="a2256" text:class-names="">.</text:span><text:span text:style-name="a2257" text:class-names=""/></text:p>
              </text:list-item>
            </text:list>
            <text:list text:style-name="a2265">
              <text:list-item>
                <text:p text:style-name="a2264" text:class-names="" text:cond-style-name=""><text:span text:style-name="a2260" text:class-names="">Standardni</text:span><text:span text:style-name="a2261" text:class-names=""><text:s text:c="1"/>GCC<text:s text:c="1"/></text:span><text:span text:style-name="a2262" text:class-names="">ekosistem</text:span><text:span text:style-name="a2263" text:class-names=""/></text:p>
              </text:list-item>
            </text:list>
            <text:list text:style-name="a2295">
              <text:list-item>
                <text:list text:style-name="a2295">
                  <text:list-item>
                    <text:p text:style-name="a2294" text:class-names="" text:cond-style-name=""><text:span text:style-name="a2266" text:class-names="">Gcov</text:span><text:span text:style-name="a2267" text:class-names=""><text:s text:c="1"/>– Alat<text:s text:c="1"/></text:span><text:span text:style-name="a2268" text:class-names="">integrisan</text:span><text:span text:style-name="a2269" text:class-names=""><text:s text:c="1"/>u GCC<text:s text:c="1"/></text:span><text:span text:style-name="a2270" text:class-names="">kompajler</text:span><text:span text:style-name="a2271" text:class-names=""><text:s text:c="1"/>koji<text:s text:c="1"/></text:span><text:span text:style-name="a2272" text:class-names="">analizira</text:span><text:span text:style-name="a2273" text:class-names=""><text:s text:c="1"/></text:span><text:span text:style-name="a2274" text:class-names="">datoteke</text:span><text:span text:style-name="a2275" text:class-names=""><text:s text:c="1"/></text:span><text:span text:style-name="a2276" text:class-names="">generisane</text:span><text:span text:style-name="a2277" text:class-names=""><text:s text:c="1"/></text:span><text:span text:style-name="a2278" text:class-names="">tokom</text:span><text:span text:style-name="a2279" text:class-names=""><text:s text:c="1"/></text:span><text:span text:style-name="a2280" text:class-names="">izvrsavanja</text:span><text:span text:style-name="a2281" text:class-names=""><text:s text:c="1"/>I<text:s text:c="1"/></text:span><text:span text:style-name="a2282" text:class-names="">racuna</text:span><text:span text:style-name="a2283" text:class-names=""><text:s text:c="1"/></text:span><text:span text:style-name="a2284" text:class-names="">koliko</text:span><text:span text:style-name="a2285" text:class-names=""><text:s text:c="1"/>je<text:s text:c="1"/></text:span><text:span text:style-name="a2286" text:class-names="">svaka</text:span><text:span text:style-name="a2287" text:class-names=""><text:s text:c="1"/></text:span><text:span text:style-name="a2288" text:class-names="">linija</text:span><text:span text:style-name="a2289" text:class-names=""><text:s text:c="1"/></text:span><text:span text:style-name="a2290" text:class-names="">koda</text:span><text:span text:style-name="a2291" text:class-names=""><text:s text:c="1"/></text:span><text:span text:style-name="a2292" text:class-names="">izvrsena</text:span><text:span text:style-name="a2293" text:class-names=""/></text:p>
                  </text:list-item>
                </text:list>
              </text:list-item>
            </text:list>
            <text:list text:style-name="a2316">
              <text:list-item>
                <text:list text:style-name="a2316">
                  <text:list-item>
                    <text:p text:style-name="a2315" text:class-names="" text:cond-style-name=""><text:span text:style-name="a2296" text:class-names="">Lcov</text:span><text:span text:style-name="a2297" text:class-names=""><text:s text:c="1"/></text:span><text:span text:style-name="a2298" text:class-names="">–<text:s text:c="1"/></text:span><text:span text:style-name="a2299" text:class-names="">Graficki</text:span><text:span text:style-name="a2300" text:class-names=""><text:s text:c="1"/>frontend za<text:s text:c="1"/></text:span><text:span text:style-name="a2301" text:class-names="">gcov</text:span><text:span text:style-name="a2302" text:class-names=""><text:s text:c="1"/>koji<text:s text:c="1"/></text:span><text:span text:style-name="a2303" text:class-names="">pretvara</text:span><text:span text:style-name="a2304" text:class-names=""><text:s text:c="1"/></text:span><text:span text:style-name="a2305" text:class-names="">tekstualne</text:span><text:span text:style-name="a2306" text:class-names=""><text:s text:c="1"/></text:span><text:span text:style-name="a2307" text:class-names="">izvjestaje</text:span><text:span text:style-name="a2308" text:class-names=""><text:s text:c="1"/>u<text:s text:c="1"/></text:span><text:span text:style-name="a2309" text:class-names="">pregledne</text:span><text:span text:style-name="a2310" text:class-names=""><text:s text:c="1"/>I<text:s text:c="1"/></text:span><text:span text:style-name="a2311" text:class-names="">interaktivne</text:span><text:span text:style-name="a2312" text:class-names=""><text:s text:c="1"/>HTML<text:s text:c="1"/></text:span><text:span text:style-name="a2313" text:class-names="">stranice</text:span><text:span text:style-name="a231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47471439" draw:style-name="a2318" draw:master-page-name="Master1-Layout10-cust-10_one_column" presentation:presentation-page-layout-name="Master1-PPL10" draw:id="Slide-2147471694">
        <draw:frame draw:id="id270" presentation:style-name="a2325" draw:name="Title 1" svg:x="0.61417in" svg:y="0.78346in" svg:width="9.11461in" svg:height="0.52362in" presentation:class="title" presentation:placeholder="false">
          <draw:text-box>
            <text:p text:style-name="a2324" text:class-names="" text:cond-style-name=""><text:span text:style-name="a2319" text:class-names="">Implementacija</text:span><text:span text:style-name="a2320" text:class-names=""><text:s text:c="1"/></text:span><text:span text:style-name="a2321" text:class-names="">pokrivenosti</text:span><text:span text:style-name="a2322" text:class-names=""><text:s text:c="1"/></text:span><text:span text:style-name="a2323" text:class-names=""/></text:p>
          </draw:text-box>
          <svg:title/>
          <svg:desc/>
        </draw:frame>
        <draw:frame draw:id="id271" presentation:style-name="a2412" draw:name="Text Placeholder 2" svg:x="0.61417in" svg:y="1.64286in" svg:width="12.10458in" svg:height="5.18572in" presentation:class="outline" presentation:placeholder="false">
          <draw:text-box>
            <text:list text:style-name="a2333">
              <text:list-item>
                <text:p text:style-name="a2332" text:class-names="" text:cond-style-name=""><text:span text:style-name="a2326" text:class-names="">Kompajliranje</text:span><text:span text:style-name="a2327" text:class-names=""><text:s text:c="1"/></text:span><text:span text:style-name="a2328" text:class-names="">sa</text:span><text:span text:style-name="a2329" text:class-names=""><text:s text:c="1"/></text:span><text:span text:style-name="a2330" text:class-names="">instrumentacijom</text:span><text:span text:style-name="a2331" text:class-names=""/></text:p>
              </text:list-item>
            </text:list>
            <text:list text:style-name="a2353">
              <text:list-item>
                <text:list text:style-name="a2353">
                  <text:list-item>
                    <text:p text:style-name="a2352" text:class-names="" text:cond-style-name=""><text:span text:style-name="a2334" text:class-names="">Moramo</text:span><text:span text:style-name="a2335" text:class-names=""><text:s text:c="1"/></text:span><text:span text:style-name="a2336" text:class-names="">reci</text:span><text:span text:style-name="a2337" text:class-names=""><text:s text:c="1"/></text:span><text:span text:style-name="a2338" text:class-names="">GCC-u</text:span><text:span text:style-name="a2339" text:class-names=""><text:s text:c="1"/></text:span><text:span text:style-name="a2340" text:class-names="">da</text:span><text:span text:style-name="a2341" text:class-names=""><text:s text:c="1"/></text:span><text:span text:style-name="a2342" text:class-names="">ubaci</text:span><text:span text:style-name="a2343" text:class-names=""><text:s text:c="1"/></text:span><text:span text:style-name="a2344" text:class-names="">brojace</text:span><text:span text:style-name="a2345" text:class-names=""><text:s text:c="1"/></text:span><text:span text:style-name="a2346" text:class-names="">u</text:span><text:span text:style-name="a2347" text:class-names=""><text:s text:c="1"/></text:span><text:span text:style-name="a2348" text:class-names="">izvrsni</text:span><text:span text:style-name="a2349" text:class-names=""><text:s text:c="1"/></text:span><text:span text:style-name="a2350" text:class-names="">fajl</text:span><text:span text:style-name="a2351" text:class-names=""/></text:p>
                  </text:list-item>
                </text:list>
              </text:list-item>
            </text:list>
            <text:list text:style-name="a2369">
              <text:list-item>
                <text:list text:style-name="a2369">
                  <text:list-item>
                    <text:p text:style-name="a2368" text:class-names="" text:cond-style-name=""><text:span text:style-name="a2354" text:class-names="">g</text:span><text:span text:style-name="a2355" text:class-names="">cc</text:span><text:span text:style-name="a2356" text:class-names=""><text:s text:c="1"/></text:span><text:span text:style-name="a2357" text:class-names="">-</text:span><text:span text:style-name="a2358" text:class-names="">-</text:span><text:span text:style-name="a2359" text:class-names="">coverage –o<text:s text:c="1"/></text:span><text:span text:style-name="a2360" text:class-names="">test_runner</text:span><text:span text:style-name="a2361" text:class-names=""><text:s text:c="1"/></text:span><text:span text:style-name="a2362" text:class-names="">kalkulator.c</text:span><text:span text:style-name="a2363" text:class-names=""><text:s text:c="1"/></text:span><text:span text:style-name="a2364" text:class-names="">test_kalkulator.c</text:span><text:span text:style-name="a2365" text:class-names=""><text:s text:c="1"/></text:span><text:span text:style-name="a2366" text:class-names="">unity.c</text:span><text:span text:style-name="a2367" text:class-names=""/></text:p>
                  </text:list-item>
                </text:list>
              </text:list-item>
            </text:list>
            <text:list text:style-name="a2377">
              <text:list-item>
                <text:p text:style-name="a2376" text:class-names="" text:cond-style-name=""><text:span text:style-name="a2370" text:class-names="">Pokrenemo</text:span><text:span text:style-name="a2371" text:class-names=""><text:s text:c="1"/></text:span><text:span text:style-name="a2372" text:class-names="">izvrsni</text:span><text:span text:style-name="a2373" text:class-names=""><text:s text:c="1"/></text:span><text:span text:style-name="a2374" text:class-names="">fajl</text:span><text:span text:style-name="a2375" text:class-names=""/></text:p>
              </text:list-item>
            </text:list>
            <text:list text:style-name="a2385">
              <text:list-item>
                <text:list text:style-name="a2385">
                  <text:list-item>
                    <text:p text:style-name="a2384" text:class-names="" text:cond-style-name=""><text:span text:style-name="a2378" text:class-names="">./</text:span><text:span text:style-name="a2379" text:class-names="">test_runner</text:span><text:span text:style-name="a2380" text:class-names=""><text:s text:c="1"/></text:span><text:span text:style-name="a2381" text:class-names="">ili</text:span><text:span text:style-name="a2382" text:class-names=""><text:s text:c="1"/>test_runner.exe</text:span><text:span text:style-name="a2383" text:class-names=""/></text:p>
                  </text:list-item>
                </text:list>
              </text:list-item>
            </text:list>
            <text:list text:style-name="a2391">
              <text:list-item>
                <text:p text:style-name="a2390" text:class-names="" text:cond-style-name=""><text:span text:style-name="a2386" text:class-names="">Generisanje</text:span><text:span text:style-name="a2387" text:class-names=""><text:s text:c="1"/>HTML<text:s text:c="1"/></text:span><text:span text:style-name="a2388" text:class-names="">izvjestaja</text:span><text:span text:style-name="a2389" text:class-names=""/></text:p>
              </text:list-item>
            </text:list>
            <text:list text:style-name="a2397">
              <text:list-item>
                <text:list text:style-name="a2397">
                  <text:list-item>
                    <text:p text:style-name="a2396" text:class-names="" text:cond-style-name=""><text:span text:style-name="a2392" text:class-names="">python -m<text:s text:c="1"/></text:span><text:span text:style-name="a2393" text:class-names="">gcovr</text:span><text:span text:style-name="a2394" text:class-names=""><text:s text:c="1"/>--html-details -o coverage.</text:span><text:span text:style-name="a2395" text:class-names="">html</text:span></text:p>
                  </text:list-item>
                </text:list>
              </text:list-item>
            </text:list>
            <text:list text:style-name="a2400">
              <text:list-item>
                <text:list text:style-name="a2400">
                  <text:list-item>
                    <text:p text:style-name="a2399" text:class-names="" text:cond-style-name=""><text:span text:style-name="a2398" text:class-names=""/></text:p>
                  </text:list-item>
                </text:list>
              </text:list-item>
            </text:list>
            <text:list text:style-name="a2411">
              <text:list-item>
                <text:list text:style-name="a2411">
                  <text:list-item>
                    <text:p text:style-name="a2410" text:class-names="" text:cond-style-name=""><text:span text:style-name="a2401" text:class-names="">Napomena</text:span><text:span text:style-name="a2402" text:class-names="">: pip install<text:s text:c="1"/></text:span><text:span text:style-name="a2403" text:class-names="">gcovr</text:span><text:span text:style-name="a2404" text:class-names=""><text:s text:c="1"/></text:span><text:span text:style-name="a2405" text:class-names="">za</text:span><text:span text:style-name="a2406" text:class-names=""><text:s text:c="1"/></text:span><text:span text:style-name="a2407" text:class-names="">instalacij</text:span><text:span text:style-name="a2408" text:class-names="">u</text:span><text:span text:style-name="a2409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4_chapter_title">
      <presentation:placeholder presentation:object="title" svg:x="0.61417in" svg:y="0.78346in" svg:width="9.11461in" svg:height="0.52362in"/>
    </style:presentation-page-layout>
    <style:presentation-page-layout style:name="Master1-PPL2" style:display-name="1_main_title">
      <presentation:placeholder presentation:object="graphic" svg:x="0in" svg:y="0in" svg:width="13.33333in" svg:height="7.5in"/>
      <presentation:placeholder presentation:object="title" svg:x="0.61417in" svg:y="0.78346in" svg:width="9.11461in" svg:height="0.52362in"/>
      <presentation:placeholder presentation:object="outline" svg:x="0.65104in" svg:y="2.60364in" svg:width="5.36458in" svg:height="1.19618in"/>
      <presentation:placeholder presentation:object="outline" svg:x="0.64963in" svg:y="1.23622in" svg:width="9.11458in" svg:height="0.43229in"/>
    </style:presentation-page-layout>
    <style:presentation-page-layout style:name="Master1-PPL3" style:display-name="2_chapter_title">
      <presentation:placeholder presentation:object="date-time" svg:x="0.42391in" svg:y="6.95139in" svg:width="3in" svg:height="0.39931in"/>
      <presentation:placeholder presentation:object="footer" svg:x="4.41667in" svg:y="6.95139in" svg:width="4.5in" svg:height="0.39931in"/>
      <presentation:placeholder presentation:object="page-number" svg:x="10.03128in" svg:y="6.95139in" svg:width="2.93574in" svg:height="0.39931in"/>
      <presentation:placeholder presentation:object="title" svg:x="0.61417in" svg:y="0.78346in" svg:width="9.11461in" svg:height="0.52362in"/>
      <presentation:placeholder presentation:object="graphic" svg:x="0in" svg:y="2.00063in" svg:width="13.33333in" svg:height="4.43073in"/>
    </style:presentation-page-layout>
    <style:presentation-page-layout style:name="Master1-PPL4" style:display-name="3_chapter_title">
      <presentation:placeholder presentation:object="title" svg:x="0.61417in" svg:y="0.78346in" svg:width="9.11461in" svg:height="0.52362in"/>
      <presentation:placeholder presentation:object="graphic" svg:x="0in" svg:y="2.14028in" svg:width="13.33333in" svg:height="3.84444in"/>
    </style:presentation-page-layout>
    <style:presentation-page-layout style:name="Master1-PPL5" style:display-name="5_one_column_one_picture">
      <presentation:placeholder presentation:object="title" svg:x="0.61417in" svg:y="0.78346in" svg:width="9.11461in" svg:height="0.52362in"/>
      <presentation:placeholder presentation:object="outline" svg:x="0.61417in" svg:y="1.64286in" svg:width="4.19445in" svg:height="4.68904in"/>
      <presentation:placeholder presentation:object="graphic" svg:x="6.43576in" svg:y="1.64557in" svg:width="6.89757in" svg:height="5.41259in"/>
    </style:presentation-page-layout>
    <style:presentation-page-layout style:name="Master1-PPL6" style:display-name="6_two_columns_wide_picture-A">
      <presentation:placeholder presentation:object="title" svg:x="0.61417in" svg:y="0.78346in" svg:width="9.11461in" svg:height="0.52362in"/>
      <presentation:placeholder presentation:object="graphic" svg:x="0.61417in" svg:y="4.29095in" svg:width="12.10392in" svg:height="2.6772in"/>
      <presentation:placeholder presentation:object="outline" svg:x="0.61417in" svg:y="1.65423in" svg:width="6.78265in" svg:height="2.1681in"/>
      <presentation:placeholder presentation:object="outline" svg:x="7.47115in" svg:y="1.65423in" svg:width="5.24694in" svg:height="2.1681in"/>
    </style:presentation-page-layout>
    <style:presentation-page-layout style:name="Master1-PPL7" style:display-name="7_two_main_sides_with_line">
      <presentation:placeholder presentation:object="title" svg:x="0.61417in" svg:y="0.78346in" svg:width="5.30497in" svg:height="0.52362in"/>
      <presentation:placeholder presentation:object="outline" svg:x="0.61417in" svg:y="1.64286in" svg:width="5.31365in" svg:height="2.97822in"/>
      <presentation:placeholder presentation:object="outline" svg:x="7.39207in" svg:y="1.64173in" svg:width="5.31365in" svg:height="2.97822in"/>
      <presentation:placeholder presentation:object="outline" svg:x="7.40551in" svg:y="0.78346in" svg:width="5.31365in" svg:height="0.51979in"/>
    </style:presentation-page-layout>
    <style:presentation-page-layout style:name="Master1-PPL8" style:display-name="7_two_main_sides_with_line_picture">
      <presentation:placeholder presentation:object="title" svg:x="0.61417in" svg:y="0.78346in" svg:width="5.30497in" svg:height="0.52362in"/>
      <presentation:placeholder presentation:object="graphic" svg:x="6.66667in" svg:y="3.11691in" svg:width="6.66667in" svg:height="4.38309in"/>
      <presentation:placeholder presentation:object="outline" svg:x="0.61417in" svg:y="1.64286in" svg:width="5.31365in" svg:height="2.97822in"/>
      <presentation:placeholder presentation:object="outline" svg:x="7.39207in" svg:y="1.64173in" svg:width="5.31365in" svg:height="2.97822in"/>
      <presentation:placeholder presentation:object="outline" svg:x="7.40551in" svg:y="0.78346in" svg:width="5.31365in" svg:height="0.51979in"/>
    </style:presentation-page-layout>
    <style:presentation-page-layout style:name="Master1-PPL9" style:display-name="9_half_picture">
      <presentation:placeholder presentation:object="title" svg:x="0.61417in" svg:y="0.78346in" svg:width="9.11461in" svg:height="0.52362in"/>
      <presentation:placeholder presentation:object="graphic" svg:x="6.35672in" svg:y="0.01738in" svg:width="6.97661in" svg:height="7.46525in"/>
      <presentation:placeholder presentation:object="outline" svg:x="0.61417in" svg:y="1.64286in" svg:width="4.19445in" svg:height="4.68904in"/>
    </style:presentation-page-layout>
    <style:presentation-page-layout style:name="Master1-PPL10" style:display-name="10_one_column">
      <presentation:placeholder presentation:object="title" svg:x="0.61417in" svg:y="0.78346in" svg:width="9.11461in" svg:height="0.52362in"/>
      <presentation:placeholder presentation:object="outline" svg:x="0.61417in" svg:y="1.64286in" svg:width="12.10458in" svg:height="5.18572in"/>
    </style:presentation-page-layout>
    <style:presentation-page-layout style:name="Master1-PPL11" style:display-name="11_two_columns_wide_picture-B">
      <presentation:placeholder presentation:object="title" svg:x="0.61417in" svg:y="0.78346in" svg:width="9.11461in" svg:height="0.52362in"/>
      <presentation:placeholder presentation:object="graphic" svg:x="0.61417in" svg:y="3.85443in" svg:width="12.35284in" svg:height="2.57692in"/>
      <presentation:placeholder presentation:object="outline" svg:x="0.61417in" svg:y="1.64286in" svg:width="7.70187in" svg:height="2.1681in"/>
      <presentation:placeholder presentation:object="outline" svg:x="8.5443in" svg:y="1.64286in" svg:width="4.42271in" svg:height="2.1681in"/>
    </style:presentation-page-layout>
    <style:presentation-page-layout style:name="Master1-PPL12" style:display-name="12_two_columns_wide_picture_chart">
      <presentation:placeholder presentation:object="title" svg:x="0.61417in" svg:y="0.78346in" svg:width="9.11461in" svg:height="0.52362in"/>
      <presentation:placeholder presentation:object="graphic" svg:x="0.61417in" svg:y="4.6129in" svg:width="12.35284in" svg:height="1.81845in"/>
      <presentation:placeholder presentation:object="outline" svg:x="0.61417in" svg:y="1.64286in" svg:width="4.34375in" svg:height="2.97822in"/>
      <presentation:placeholder presentation:object="outline" svg:x="5.13889in" svg:y="1.64286in" svg:width="4.5899in" svg:height="2.97822in"/>
    </style:presentation-page-layout>
    <style:presentation-page-layout style:name="Master1-PPL13" style:display-name="13_product_description">
      <presentation:placeholder presentation:object="title" svg:x="0.61417in" svg:y="0.78346in" svg:width="9.11461in" svg:height="0.52362in"/>
      <presentation:placeholder presentation:object="graphic" svg:x="6.43576in" svg:y="4.49206in" svg:width="6.89757in" svg:height="2.56609in"/>
      <presentation:placeholder presentation:object="outline" svg:x="0.61417in" svg:y="1.64286in" svg:width="4.19445in" svg:height="4.68904in"/>
      <presentation:placeholder presentation:object="outline" svg:x="6.43576in" svg:y="1.64286in" svg:width="6.28298in" svg:height="2.40714in"/>
    </style:presentation-page-layout>
    <style:presentation-page-layout style:name="Master1-PPL14" style:display-name="14_title_subtitle">
      <presentation:placeholder presentation:object="title" svg:x="0.61417in" svg:y="0.78346in" svg:width="9.11461in" svg:height="0.52362in"/>
      <presentation:placeholder presentation:object="outline" svg:x="0.61417in" svg:y="1.64286in" svg:width="9.11461in" svg:height="2.16923in"/>
    </style:presentation-page-layout>
    <style:presentation-page-layout style:name="Master1-PPL15" style:display-name="15_title">
      <presentation:placeholder presentation:object="title" svg:x="0.61417in" svg:y="0.78346in" svg:width="9.11461in" svg:height="0.52362in"/>
    </style:presentation-page-layout>
    <style:presentation-page-layout style:name="Master1-PPL16" style:display-name="16_title">
      <presentation:placeholder presentation:object="title" svg:x="0.61417in" svg:y="0.78346in" svg:width="9.11461in" svg:height="0.52362in"/>
      <presentation:placeholder presentation:object="table" svg:x="0.61417in" svg:y="1.72648in" svg:width="9.11461in" svg:height="1.67352in"/>
    </style:presentation-page-layout>
    <style:presentation-page-layout style:name="Master1-PPL17" style:display-name="17_title">
      <presentation:placeholder presentation:object="title" svg:x="0.61417in" svg:y="0.78346in" svg:width="9.11461in" svg:height="0.52362in"/>
    </style:presentation-page-layout>
    <style:presentation-page-layout style:name="Master1-PPL18" style:display-name="Custom Layout"/>
    <style:presentation-page-layout style:name="Master1-PPL19" style:display-name="section title">
      <presentation:placeholder presentation:object="title" svg:x="3.98306in" svg:y="3.86353in" svg:width="9.11461in" svg:height="0.52362in"/>
    </style:presentation-page-layout>
    <style:style style:family="table-cell" style:name="a1311">
      <style:table-cell-properties fo:background-color="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2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313">
      <style:table-cell-properties fo:background-color="#e7e7e7"/>
    </style:style>
    <style:style style:family="table-cell" style:name="a1314">
      <style:table-cell-properties fo:background-color="#e7e7e7"/>
    </style:style>
    <style:style style:family="table-cell" style:name="a1315">
      <style:table-cell-properties fo:background-color="#e97132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6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1317">
      <style:table-cell-properties fo:background-color="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8">
      <style:table-cell-properties fo:background-color="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9">
      <style:table-cell-properties fo:background-color="#e7eb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54">
      <style:table-cell-properties fo:background-color="#f6f5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155">
      <style:table-cell-properties/>
    </style:style>
    <style:style style:family="table-cell" style:name="a1156">
      <style:table-cell-properties fo:background-color="#ece9ef"/>
    </style:style>
    <style:style style:family="table-cell" style:name="a1157">
      <style:table-cell-properties/>
    </style:style>
    <style:style style:family="table-cell" style:name="a1158">
      <style:table-cell-properties fo:background-color="#ece9ef"/>
    </style:style>
    <style:style style:family="table-cell" style:name="a1159">
      <style:table-cell-properties fo:background-color="#cbc3d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9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40">
      <style:table-cell-properties fo:background-color="#4ea72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1">
      <style:table-cell-properties fo:background-color="#f0e8ee" fo:border-top="0.05556in double #000000"/>
      <style:text-properties fo:font-weight="bold" style:font-weight-asian="bold" style:font-weight-complex="bold"/>
    </style:style>
    <style:style style:family="table-cell" style:name="a1342">
      <style:table-cell-properties/>
      <style:text-properties fo:font-weight="bold" style:font-weight-asian="bold" style:font-weight-complex="bold"/>
    </style:style>
    <style:style style:family="table-cell" style:name="a1343">
      <style:table-cell-properties/>
      <style:text-properties fo:font-weight="bold" style:font-weight-asian="bold" style:font-weight-complex="bold"/>
    </style:style>
    <style:style style:family="table-cell" style:name="a1320">
      <style:table-cell-properties/>
    </style:style>
    <style:style style:family="table-cell" style:name="a1321">
      <style:table-cell-properties fo:background-color="#ccd4cc"/>
    </style:style>
    <style:style style:family="table-cell" style:name="a1322">
      <style:table-cell-properties/>
    </style:style>
    <style:style style:family="table-cell" style:name="a1323">
      <style:table-cell-properties fo:background-color="#ccd4cc"/>
    </style:style>
    <style:style style:family="table-cell" style:name="a1324">
      <style:table-cell-properties fo:background-color="#196b2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25">
      <style:table-cell-properties fo:background-color="#196b2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26">
      <style:table-cell-properties fo:background-color="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27">
      <style:table-cell-properties fo:background-color="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60">
      <style:table-cell-properties fo:background-color="#cbc3d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28">
      <style:table-cell-properties fo:background-color="#f0e8ee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61">
      <style:table-cell-properties fo:background-color="#cbc3d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29">
      <style:table-cell-properties/>
    </style:style>
    <style:style style:family="table-cell" style:name="a1162">
      <style:table-cell-properties fo:background-color="#cbc3d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0">
      <style:table-cell-properties/>
    </style:style>
    <style:style style:family="table-cell" style:name="a1291">
      <style:table-cell-properties fo:background-color="#ccd2d8"/>
    </style:style>
    <style:style style:family="table-cell" style:name="a1300">
      <style:table-cell-properties fo:background-color="#e7e7e7"/>
    </style:style>
    <style:style style:family="table-cell" style:name="a1292">
      <style:table-cell-properties/>
    </style:style>
    <style:style style:family="table-cell" style:name="a1301">
      <style:table-cell-properties fo:background-color="#4ea72e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3">
      <style:table-cell-properties fo:background-color="#ccd2d8"/>
    </style:style>
    <style:style style:family="table-cell" style:name="a1302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1294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3">
      <style:table-cell-properties fo:background-color="#4ea72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5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4">
      <style:table-cell-properties fo:background-color="#4ea72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5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297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6">
      <style:table-cell-properties fo:background-color="#e7e7e7"/>
    </style:style>
    <style:style style:family="table-cell" style:name="a1298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307">
      <style:table-cell-properties fo:background-color="#e7e7e7"/>
    </style:style>
    <style:style style:family="table-cell" style:name="a1299">
      <style:table-cell-properties fo:background-color="#e7e7e7"/>
    </style:style>
    <style:style style:family="table-cell" style:name="a1308">
      <style:table-cell-properties fo:background-color="#a02b93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9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1330">
      <style:table-cell-properties fo:background-color="#dfcddc"/>
    </style:style>
    <style:style style:family="table-cell" style:name="a1331">
      <style:table-cell-properties/>
    </style:style>
    <style:style style:family="table-cell" style:name="a1332">
      <style:table-cell-properties fo:background-color="#dfcddc"/>
    </style:style>
    <style:style style:family="table-cell" style:name="a1333">
      <style:table-cell-properties fo:background-color="#a02b9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4">
      <style:table-cell-properties fo:background-color="#a02b9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5">
      <style:table-cell-properties fo:background-color="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6">
      <style:table-cell-properties fo:background-color="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7">
      <style:table-cell-properties fo:background-color="#f0e8ee"/>
      <style:text-properties fo:color="#000000" fo:font-family="+mn-lt" style:font-family-asian="+mn-ea" style:font-family-complex="+mn-cs"/>
    </style:style>
    <style:style style:family="table-cell" style:name="a1338">
      <style:table-cell-properties fo:background-color="#dfcddc"/>
    </style:style>
    <style:style style:family="table-cell" style:name="a1339">
      <style:table-cell-properties fo:background-color="#dfcddc"/>
    </style:style>
    <style:style style:family="table-cell" style:name="a1310">
      <style:table-cell-properties fo:background-color="#a02b93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846e96" draw:opacity="100%" draw:stroke="solid" svg:stroke-width="0.01389in" svg:stroke-color="#342a3c" svg:stroke-opacity="100%" draw:stroke-linejoin="miter" svg:stroke-linecap="butt"/>
    </style:default-style>
    <table:table-template table:name="{5C22544A-7EE6-4342-B048-85BDC9FD1C3A}">
      <table:first-row table:style-name="a1294" table:paragraph-style-name=""/>
      <table:last-row table:style-name="a1295" table:paragraph-style-name=""/>
      <table:first-column table:style-name="a1296" table:paragraph-style-name=""/>
      <table:last-column table:style-name="a1297" table:paragraph-style-name=""/>
      <table:body table:style-name="a1289" table:paragraph-style-name=""/>
      <table:even-rows table:style-name="a1292" table:paragraph-style-name=""/>
      <table:odd-rows table:style-name="a1293" table:paragraph-style-name=""/>
      <table:even-columns table:style-name="a1290" table:paragraph-style-name=""/>
      <table:odd-columns table:style-name="a1291" table:paragraph-style-name=""/>
    </table:table-template>
    <table:table-template table:name="{F5AB1C69-6EDB-4FF4-983F-18BD219EF322}">
      <table:first-row table:style-name="a1324" table:paragraph-style-name=""/>
      <table:last-row table:style-name="a1325" table:paragraph-style-name=""/>
      <table:first-column table:style-name="a1326" table:paragraph-style-name=""/>
      <table:last-column table:style-name="a1327" table:paragraph-style-name=""/>
      <table:body table:style-name="a1319" table:paragraph-style-name=""/>
      <table:even-rows table:style-name="a1322" table:paragraph-style-name=""/>
      <table:odd-rows table:style-name="a1323" table:paragraph-style-name=""/>
      <table:even-columns table:style-name="a1320" table:paragraph-style-name=""/>
      <table:odd-columns table:style-name="a1321" table:paragraph-style-name=""/>
    </table:table-template>
    <table:table-template table:name="{74C1A8A3-306A-4EB7-A6B1-4F7E0EB9C5D6}">
      <table:first-row table:style-name="a1308" table:paragraph-style-name=""/>
      <table:last-row table:style-name="a1309" table:paragraph-style-name=""/>
      <table:first-column table:style-name="a1310" table:paragraph-style-name=""/>
      <table:last-column table:style-name="a1311" table:paragraph-style-name=""/>
      <table:body table:style-name="a1305" table:paragraph-style-name=""/>
      <table:odd-rows table:style-name="a1307" table:paragraph-style-name=""/>
      <table:odd-columns table:style-name="a1306" table:paragraph-style-name=""/>
    </table:table-template>
    <table:table-template table:name="{46F890A9-2807-4EBB-B81D-B2AA78EC7F39}">
      <table:first-row table:style-name="a1340" table:paragraph-style-name=""/>
      <table:last-row table:style-name="a1341" table:paragraph-style-name=""/>
      <table:first-column table:style-name="a1342" table:paragraph-style-name=""/>
      <table:last-column table:style-name="a1343" table:paragraph-style-name=""/>
      <table:body table:style-name="a1337" table:paragraph-style-name=""/>
      <table:odd-rows table:style-name="a1339" table:paragraph-style-name=""/>
      <table:odd-columns table:style-name="a1338" table:paragraph-style-name=""/>
    </table:table-template>
    <table:table-template table:name="{93296810-A885-4BE3-A3E7-6D5BEEA58F35}">
      <table:first-row table:style-name="a1159" table:paragraph-style-name=""/>
      <table:last-row table:style-name="a1160" table:paragraph-style-name=""/>
      <table:first-column table:style-name="a1161" table:paragraph-style-name=""/>
      <table:last-column table:style-name="a1162" table:paragraph-style-name=""/>
      <table:body table:style-name="a1154" table:paragraph-style-name=""/>
      <table:even-rows table:style-name="a1157" table:paragraph-style-name=""/>
      <table:odd-rows table:style-name="a1158" table:paragraph-style-name=""/>
      <table:even-columns table:style-name="a1155" table:paragraph-style-name=""/>
      <table:odd-columns table:style-name="a1156" table:paragraph-style-name=""/>
    </table:table-template>
    <table:table-template table:name="{85BE263C-DBD7-4A20-BB59-AAB30ACAA65A}">
      <table:first-row table:style-name="a1315" table:paragraph-style-name=""/>
      <table:last-row table:style-name="a1316" table:paragraph-style-name=""/>
      <table:first-column table:style-name="a1317" table:paragraph-style-name=""/>
      <table:last-column table:style-name="a1318" table:paragraph-style-name=""/>
      <table:body table:style-name="a1312" table:paragraph-style-name=""/>
      <table:odd-rows table:style-name="a1314" table:paragraph-style-name=""/>
      <table:odd-columns table:style-name="a1313" table:paragraph-style-name=""/>
    </table:table-template>
    <table:table-template table:name="{2A488322-F2BA-4B5B-9748-0D474271808F}">
      <table:first-row table:style-name="a1301" table:paragraph-style-name=""/>
      <table:last-row table:style-name="a1302" table:paragraph-style-name=""/>
      <table:first-column table:style-name="a1303" table:paragraph-style-name=""/>
      <table:last-column table:style-name="a1304" table:paragraph-style-name=""/>
      <table:body table:style-name="a1298" table:paragraph-style-name=""/>
      <table:odd-rows table:style-name="a1300" table:paragraph-style-name=""/>
      <table:odd-columns table:style-name="a1299" table:paragraph-style-name=""/>
    </table:table-template>
    <table:table-template table:name="{7DF18680-E054-41AD-8BC1-D1AEF772440D}">
      <table:first-row table:style-name="a1333" table:paragraph-style-name=""/>
      <table:last-row table:style-name="a1334" table:paragraph-style-name=""/>
      <table:first-column table:style-name="a1335" table:paragraph-style-name=""/>
      <table:last-column table:style-name="a1336" table:paragraph-style-name=""/>
      <table:body table:style-name="a1328" table:paragraph-style-name=""/>
      <table:even-rows table:style-name="a1331" table:paragraph-style-name=""/>
      <table:odd-rows table:style-name="a1332" table:paragraph-style-name=""/>
      <table:even-columns table:style-name="a1329" table:paragraph-style-name=""/>
      <table:odd-columns table:style-name="a13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 style:parent-style-name="Graphics">
      <style:graphic-properties draw:fill="none" fo:clip="rect(0in, 0in, 0in, 0in)" draw:stroke="none" draw:image-opacity="100%"/>
    </style:style>
    <style:style style:family="paragraph" style:name="a313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">
      <style:graphic-properties draw:fill="none" draw:stroke="solid" svg:stroke-width="0.01042in" svg:stroke-color="#44546a" svg:stroke-opacity="14.901%" draw:stroke-linejoin="miter" svg:stroke-linecap="butt"/>
    </style:style>
    <style:style style:family="text" style:name="a34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in, 0in, 0in, 0in)" draw:stroke="none" draw:image-opacity="100%"/>
    </style:style>
    <style:style style:family="text" style:name="a1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 style:parent-style-name="Graphics">
      <style:graphic-properties draw:fill="none" fo:clip="rect(0in, 0in, 0in, 0in)" draw:stroke="none" draw:image-opacity="100%"/>
    </style:style>
    <style:style style:family="paragraph" style:name="a2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fo:clip="rect(0in, 0in, 0in, 0in)" draw:stroke="none" draw:image-opacity="100%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fo:clip="rect(0in, 0in, 0in, 0in)" draw:stroke="none" draw:image-opacity="100%"/>
    </style:style>
    <style:style style:family="text" style:name="a61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>
      <style:graphic-properties draw:fill="none" draw:stroke="solid" svg:stroke-width="0.01042in" svg:stroke-color="#44546a" svg:stroke-opacity="14.901%" draw:stroke-linejoin="miter" svg:stroke-linecap="butt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 style:parent-style-name="Graphics">
      <style:graphic-properties draw:fill="none" fo:clip="rect(0in, 0in, 0in, 0in)" draw:stroke="none" draw:image-opacity="100%"/>
    </style:style>
    <style:style style:family="graphic" style:name="a389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1042in" svg:stroke-color="#44546a" svg:stroke-opacity="14.901%" draw:stroke-linejoin="miter" svg:stroke-linecap="butt"/>
    </style:style>
    <style:style style:family="text" style:name="a391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draw:fill="none" draw:stroke="solid" svg:stroke-width="0.01042in" svg:stroke-color="#44546a" svg:stroke-opacity="14.901%" draw:stroke-linejoin="miter" svg:stroke-linecap="butt"/>
    </style:style>
    <style:style style:family="text" style:name="a473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1042in" svg:stroke-color="#44546a" svg:stroke-opacity="14.901%" draw:stroke-linejoin="miter" svg:stroke-linecap="but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9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0in, 0in, 0in, 0in)" draw:stroke="none" draw:image-opacity="100%"/>
    </style:style>
    <style:style style:family="text" style:name="a55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 style:parent-style-name="Graphics">
      <style:graphic-properties draw:fill="none" fo:clip="rect(0in, 0in, 0in, 0in)" draw:stroke="none" draw:image-opacity="100%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 style:parent-style-name="Graphics">
      <style:graphic-properties draw:fill="none" draw:stroke="none"/>
    </style:style>
    <style:style style:family="text" style:name="a41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draw:fill="none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 style:parent-style-name="Graphics">
      <style:graphic-properties draw:fill="none" fo:clip="rect(0in, 0in, 0in, 0in)" draw:stroke="none" draw:image-opacity="100%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 style:parent-style-name="Graphics">
      <style:graphic-properties draw:fill="none" fo:clip="rect(0in, 0in, 0in, 0in)" draw:stroke="none" draw:image-opacity="100%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fo:clip="rect(0in, 0in, 0in, 0in)" draw:stroke="none" draw:image-opacity="100%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fo:clip="rect(0in, 0in, 0in, 0in)" draw:stroke="none" draw:image-opacity="100%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 style:parent-style-name="Graphics">
      <style:graphic-properties draw:fill="none" fo:clip="rect(0in, 0in, 0in, 0in)" draw:stroke="none" draw:image-opacity="100%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size="0.15278in" style:font-size-asian="0.15278in" style:font-size-complex="0.15278in" fo:language="en" fo:country="AU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size="0.15278in" style:font-size-asian="0.15278in" style:font-size-complex="0.15278in" fo:language="en" fo:country="AU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8">
      <style:text-properties fo:font-size="0.15278in" style:font-size-asian="0.15278in" style:font-size-complex="0.15278in" fo:language="en" fo:country="AU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2">
      <style:table-row-properties style:row-height="0.40556in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size="0.15278in" style:font-size-asian="0.15278in" style:font-size-complex="0.15278in" fo:language="en" fo:country="AU"/>
    </style:style>
    <style:style style:family="paragraph" style:name="a10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/>
    </style:style>
    <style:style style:family="table-cell" style:name="a1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7">
      <style:text-properties fo:font-size="0.15278in" style:font-size-asian="0.15278in" style:font-size-complex="0.15278in" fo:language="en" fo:country="AU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8">
      <style:paragraph-properties/>
    </style:style>
    <style:style style:family="graphic" style:name="a82" style:parent-style-name="Graphics">
      <style:graphic-properties draw:fill="none" fo:clip="rect(0in, 0in, 0in, 0in)" draw:stroke="none" draw:imag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4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1">
      <style:text-properties fo:font-size="0.15278in" style:font-size-asian="0.15278in" style:font-size-complex="0.15278in" fo:language="en" fo:country="AU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size="0.15278in" style:font-size-asian="0.15278in" style:font-size-complex="0.15278in" fo:language="en" fo:country="AU"/>
    </style:style>
    <style:style style:family="paragraph" style:name="a1126">
      <style:paragraph-properties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size="0.15278in" style:font-size-asian="0.15278in" style:font-size-complex="0.15278in" fo:language="en" fo:country="AU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7b6c93" style:text-line-through-type="none" style:text-line-through-style="none" style:text-line-through-width="auto" style:text-line-through-color="font-color" style:text-position="0% 100%" fo:font-family="Montserrat Medium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.6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1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0">
      <style:paragraph-properties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6" style:parent-style-name="Graphics">
      <style:graphic-properties draw:fill="none" fo:clip="rect(0in, 0in, 0in, 0in)" draw:stroke="none" draw:image-opacity="100%"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33">
      <style:table-row-properties style:row-height="0.40556in"/>
    </style:style>
    <style:style style:family="text" style:name="a10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size="0.15278in" style:font-size-asian="0.15278in" style:font-size-complex="0.15278in" fo:language="en" fo:country="AU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/>
    </style:style>
    <style:style style:family="paragraph" style:name="a1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8">
      <style:text-properties fo:font-size="0.15278in" style:font-size-asian="0.15278in" style:font-size-complex="0.15278in" fo:language="en" fo:country="AU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/>
    </style:style>
    <style:style style:family="paragraph" style:name="a1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able" style:name="a1064">
      <style:table-properties style:writing-mode="lr-tb"/>
    </style:style>
    <style:style style:family="table-column" style:name="a1065">
      <style:table-column-properties style:column-width="1.77778in"/>
    </style:style>
    <style:style style:family="table-cell" style:name="a1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066">
      <style:table-column-properties style:column-width="1.77778in"/>
    </style:style>
    <style:style style:family="text" style:name="a1142">
      <style:text-properties fo:font-size="0.15278in" style:font-size-asian="0.15278in" style:font-size-complex="0.15278in" fo:language="en" fo:country="AU"/>
    </style:style>
    <style:style style:family="table-column" style:name="a1067">
      <style:table-column-properties style:column-width="1.77778in"/>
    </style:style>
    <style:style style:family="paragraph" style:name="a1143">
      <style:paragraph-properties/>
    </style:style>
    <style:style style:family="table-column" style:name="a1068">
      <style:table-column-properties style:column-width="1.77778in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069">
      <style:table-column-properties style:column-width="1.77778in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6">
      <style:text-properties fo:font-size="0.15278in" style:font-size-asian="0.15278in" style:font-size-complex="0.15278in" fo:language="en" fo:country="AU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ffffff" draw:opacity="100%" presentation:transition-type="automatic" presentation:transition-speed="slow" smil:type="fade" smil:subtype="crossfade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fo:clip="rect(0in, 0in, 0in, 0in)" draw:stroke="none" draw:image-opacity="100%"/>
    </style:style>
    <style:style style:family="paragraph" style:name="a8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fa4c74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1070">
      <style:table-row-properties style:row-height="0.40556in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size="0.15278in" style:font-size-asian="0.15278in" style:font-size-complex="0.15278in" fo:language="en" fo:country="AU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/>
    </style:style>
    <style:style style:family="table-cell" style:name="a1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0">
      <style:text-properties fo:font-size="0.15278in" style:font-size-asian="0.15278in" style:font-size-complex="0.15278in" fo:language="en" fo:country="AU"/>
    </style:style>
    <style:style style:family="text" style:name="a1075">
      <style:text-properties fo:font-size="0.15278in" style:font-size-asian="0.15278in" style:font-size-complex="0.15278in" fo:language="en" fo:country="AU"/>
    </style:style>
    <style:style style:family="paragraph" style:name="a1151">
      <style:paragraph-properties/>
    </style:style>
    <style:style style:family="paragraph" style:name="a1076">
      <style:paragraph-properties/>
    </style:style>
    <style:style style:family="table-cell" style:name="a1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30" style:parent-style-name="Graphics">
      <style:graphic-properties draw:fill="none" fo:clip="rect(0in, 0in, 0in, 0in)" draw:stroke="none" draw:image-opacity="100%"/>
    </style:style>
    <style:style style:family="text" style:name="a1079">
      <style:text-properties fo:font-size="0.15278in" style:font-size-asian="0.15278in" style:font-size-complex="0.15278in" fo:language="en" fo:country="AU"/>
    </style:style>
    <style:style style:family="text" style:name="a1231">
      <style:text-properties fo:font-variant="normal" fo:text-transform="none" fo:color="#2dd5d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44546a" draw:opacity="4.705%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e6014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897ca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3">
      <style:text-properties fo:font-size="0.15278in" style:font-size-asian="0.15278in" style:font-size-complex="0.15278in" fo:language="en" fo:country="AU"/>
    </style:style>
    <style:style style:family="paragraph" style:name="a1084">
      <style:paragraph-properties/>
    </style:style>
    <style:style style:family="table-cell" style:name="a1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7">
      <style:text-properties fo:font-size="0.15278in" style:font-size-asian="0.15278in" style:font-size-complex="0.15278in" fo:language="en" fo:country="AU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91">
      <style:table-row-properties style:row-height="0.40556in"/>
    </style:style>
    <style:style style:family="paragraph" style:name="a9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size="0.15278in" style:font-size-asian="0.15278in" style:font-size-complex="0.15278in" fo:language="en" fo:country="AU"/>
    </style:style>
    <style:style style:family="paragraph" style:name="a1093">
      <style:paragraph-properties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size="0.15278in" style:font-size-asian="0.15278in" style:font-size-complex="0.15278in" fo:language="en" fo:country="AU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5">
      <style:drawing-page-properties draw:fill="solid" draw:fill-color="#ffffff" draw:opacity="100%" presentation:transition-type="automatic" presentation:transition-speed="slow" smil:type="fade" smil:subtype="crossfade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6" style:parent-style-name="Graphics">
      <style:graphic-properties draw:fill="none" fo:clip="rect(0in, 0in, 0in, 0in)" draw:stroke="none" draw:image-opacity="100%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7b6c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image-opacity="100%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 style:parent-style-name="Graphics">
      <style:graphic-properties draw:fill="none" fo:clip="rect(0in, 0in, 0in, 0in)" draw:stroke="none" draw:image-opacity="100%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ontserrat Medium" style:font-family-complex="Open Sans" style:font-family-generic="modern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31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102"/>
    <text:list-style style:name="a71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106"/>
    <text:list-style style:name="a1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32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39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110"/>
    <text:list-style style:name="a39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115"/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9"/>
    <text:list-style style:name="a84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073"/>
    <text:list-style style:name="a33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7"/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3"/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127"/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34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344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081"/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5"/>
    <text:list-style style:name="a1131"/>
    <text:list-style style:name="a1089"/>
    <text:list-style style:name="a86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6"/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4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094"/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098"/>
    <text:list-style style:name="a1140"/>
    <text:list-style style:name="a40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144"/>
    <text:list-style style:name="a40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148"/>
    <text:list-style style:name="a1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9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9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1152"/>
    <text:list-style style:name="a41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25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42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426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8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1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2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4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6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5" text:bullet-char="•">
        <style:list-level-properties text:space-before="0.80382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6" text:bullet-char="•">
        <style:list-level-properties text:space-before="0.14583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7" text:bullet-char="•">
        <style:list-level-properties text:space-before="0.2934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8" text:bullet-char="•">
        <style:list-level-properties text:space-before="0.44097in" text:min-label-width="0.19618in"/>
        <style:text-properties fo:color="#846e96" fo:font-family="Arial" style:font-family-generic="swiss" style:font-pitch="variable" fo:font-size="80%"/>
      </text:list-level-style-bullet>
      <text:list-level-style-bullet text:level="9" text:bullet-char="•">
        <style:list-level-properties text:space-before="0.5816in" text:min-label-width="0.19618in"/>
        <style:text-properties fo:color="#846e96" fo:font-family="Arial" style:font-family-generic="swiss" style:font-pitch="variable" fo:font-size="80%"/>
      </text:list-level-style-bullet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dex" style:page-layout-name="pageLayout1" draw:style-name="a0">
      <draw:frame draw:id="id0" draw:style-name="a1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1" presentation:style-name="a5" draw:name="Title Placeholder 7" svg:x="0.61417in" svg:y="0.78346in" svg:width="9.11461in" svg:height="0.52362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presentation:notes style:page-layout-name="pageLayout2" draw:style-name="a37">
        <draw:frame draw:id="id2" presentation:style-name="a8" draw:name="Kopfzeilenplatzhalter 1" svg:x="0in" svg:y="0in" svg:width="3.25in" svg:height="0.50174in" presentation:class="header" presentation:placeholder="false">
          <draw:text-box>
            <text:p text:style-name="a7" text:class-names="" text:cond-style-name=""><text:span text:style-name="a6" text:class-names=""/></text:p>
          </draw:text-box>
          <svg:title/>
          <svg:desc/>
        </draw:frame>
        <draw:frame draw:id="id3" presentation:style-name="a13" draw:name="Datumsplatzhalter 2" svg:x="4.24826in" svg:y="0in" svg:width="3.25in" svg:height="0.50174in" presentation:class="date-time" presentation:placeholder="false">
          <draw:text-box>
            <text:p text:style-name="a12" text:class-names="" text:cond-style-name=""><text:span text:style-name="a9" text:class-names=""><text:date text:fixed="false" style:data-style-name="a10">05.06.2026</text:date></text:span><text:span text:style-name="a1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4" draw:name="Folienbildplatzhalter 3">
          <svg:title/>
          <svg:desc/>
        </draw:page-thumbnail>
        <draw:frame draw:id="id5" presentation:style-name="a29" draw:name="Notizenplatzhalter 4" svg:x="0.75in" svg:y="4.8125in" svg:width="6in" svg:height="3.9375in" presentation:class="notes" presentation:placeholder="false">
          <draw:text-box>
            <text:p text:style-name="a16" text:class-names="" text:cond-style-name=""><text:span text:style-name="a15" text:class-names="">Mastertextformat bearbeiten</text:span></text:p>
            <text:list text:style-name="a19">
              <text:list-item>
                <text:list text:style-name="a19">
                  <text:list-item>
                    <text:p text:style-name="a18" text:class-names="" text:cond-style-name=""><text:span text:style-name="a17" text:class-names="">Zweite Ebene</text:span></text:p>
                  </text:list-item>
                </text:list>
              </text:list-item>
            </text:list>
            <text:list text:style-name="a22">
              <text:list-item>
                <text:list text:style-name="a22">
                  <text:list-item>
                    <text:list text:style-name="a22">
                      <text:list-item>
                        <text:p text:style-name="a21" text:class-names="" text:cond-style-name=""><text:span text:style-name="a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list text:style-name="a25">
                          <text:list-item>
                            <text:p text:style-name="a24" text:class-names="" text:cond-style-name=""><text:span text:style-name="a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list text:style-name="a28">
                          <text:list-item>
                            <text:list text:style-name="a28">
                              <text:list-item>
                                <text:p text:style-name="a27" text:class-names="" text:cond-style-name=""><text:span text:style-name="a2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" draw:name="Fußzeilenplatzhalter 5" svg:x="0in" svg:y="9.49826in" svg:width="3.25in" svg:height="0.50174in" presentation:class="foot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6" draw:name="Foliennummernplatzhalter 6" svg:x="4.24826in" svg:y="9.49826in" svg:width="3.25in" svg:height="0.50174in" presentation:class="page-number" presentation:placeholder="false">
          <draw:text-box>
  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  </draw:text-box>
          <svg:title/>
          <svg:desc/>
        </draw:frame>
      </presentation:notes>
    </style:master-page>
    <style:master-page style:name="Master1-Layout1-cust-4_chapter_title" style:page-layout-name="pageLayout1" draw:style-name="a38">
      <draw:frame draw:id="id8" draw:layer="Master1-bg" draw:style-name="a39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9" draw:style-name="a40" draw:name="Picture 3" svg:x="12.09257in" svg:y="0.71359in" svg:width="0.87675in" svg:height="0.71011in" style:rel-width="scale" style:rel-height="scale">
        <draw:image xlink:href="media/image3.png" xlink:type="simple" xlink:show="embed" xlink:actuate="onLoad"/>
        <svg:title/>
        <svg:desc>A logo with a yellow and purple design

Description automatically generated</svg:desc>
      </draw:frame>
      <draw:custom-shape svg:x="0in" svg:y="0.75in" svg:width="0.08333in" svg:height="0.59028in" draw:id="id10" draw:style-name="a43" draw:name="Rectangle 4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47" draw:name="Title 2" svg:x="0.61417in" svg:y="0.78346in" svg:width="9.11461in" svg:height="0.52362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2" draw:style-name="a48" draw:name="Picture 5" svg:x="0in" svg:y="1.9928in" svg:width="13.33333in" svg:height="4.43in" style:rel-width="scale" style:rel-height="scale">
        <draw:image xlink:href="media/image4.jpg" xlink:type="simple" xlink:show="embed" xlink:actuate="onLoad"/>
        <svg:title/>
        <svg:desc/>
      </draw:frame>
      <presentation:notes style:page-layout-name="pageLayout2" draw:style-name="a80">
        <draw:frame draw:id="id2" presentation:style-name="a51" draw:name="Kopfzeilenplatzhalter 1" svg:x="0in" svg:y="0in" svg:width="3.25in" svg:height="0.50174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3" presentation:style-name="a56" draw:name="Datumsplatzhalter 2" svg:x="4.24826in" svg:y="0in" svg:width="3.25in" svg:height="0.50174in" presentation:class="date-time" presentation:placeholder="false">
          <draw:text-box>
            <text:p text:style-name="a55" text:class-names="" text:cond-style-name=""><text:span text:style-name="a52" text:class-names=""><text:date text:fixed="false" style:data-style-name="a53">05.06.2026</text:date></text:span><text:span text:style-name="a5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57" draw:name="Folienbildplatzhalter 3">
          <svg:title/>
          <svg:desc/>
        </draw:page-thumbnail>
        <draw:frame draw:id="id5" presentation:style-name="a72" draw:name="Notizenplatzhalter 4" svg:x="0.75in" svg:y="4.8125in" svg:width="6in" svg:height="3.9375in" presentation:class="notes" presentation:placeholder="false">
          <draw:text-box>
            <text:p text:style-name="a59" text:class-names="" text:cond-style-name=""><text:span text:style-name="a58" text:class-names="">Mastertextformat bearbeiten</text:span></text:p>
            <text:list text:style-name="a62">
              <text:list-item>
                <text:list text:style-name="a62">
                  <text:list-item>
                    <text:p text:style-name="a61" text:class-names="" text:cond-style-name=""><text:span text:style-name="a60" text:class-names="">Zweite Ebene</text:span></text:p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p text:style-name="a64" text:class-names="" text:cond-style-name=""><text:span text:style-name="a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p text:style-name="a67" text:class-names="" text:cond-style-name=""><text:span text:style-name="a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5" draw:name="Fußzeilenplatzhalter 5" svg:x="0in" svg:y="9.49826in" svg:width="3.25in" svg:height="0.501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7" presentation:style-name="a79" draw:name="Foliennummernplatzhalt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  </draw:text-box>
          <svg:title/>
          <svg:desc/>
        </draw:frame>
      </presentation:notes>
    </style:master-page>
    <style:master-page style:name="Master1-Layout2-cust-1_main_title" style:page-layout-name="pageLayout1" draw:style-name="a81">
      <draw:frame draw:id="id13" draw:layer="Master1-bg" draw:style-name="a82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14" presentation:style-name="a86" draw:name="Bildplatzhalter 8" svg:x="0in" svg:y="0in" svg:width="13.33333in" svg:height="7.5in" presentation:class="graphic" presentation:placeholder="false">
        <draw:text-box>
          <text:p text:style-name="a85" text:class-names="" text:cond-style-name=""><text:span text:style-name="a83" text:class-names="">Click icon to add picture</text:span><text:span text:style-name="a84" text:class-names=""/></text:p>
        </draw:text-box>
        <svg:title/>
        <svg:desc/>
      </draw:frame>
      <draw:frame draw:id="id15" presentation:style-name="a90" draw:name="Title 8" svg:x="0.61417in" svg:y="0.78346in" svg:width="9.11461in" svg:height="0.52362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6" presentation:style-name="a94" draw:name="Text Placeholder 14" svg:x="0.65104in" svg:y="2.60364in" svg:width="5.36458in" svg:height="1.19618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7" presentation:style-name="a98" draw:name="Text Placeholder 18" svg:x="0.64963in" svg:y="1.23622in" svg:width="9.11458in" svg:height="0.43229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</draw:text-box>
        <svg:title/>
        <svg:desc/>
      </draw:frame>
      <draw:custom-shape svg:x="0in" svg:y="0.75in" svg:width="0.08333in" svg:height="0.59028in" draw:id="id18" draw:style-name="a101" draw:name="Rectangle 1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3">
        <draw:frame draw:id="id2" presentation:style-name="a104" draw:name="Kopfzeilenplatzhalter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3" presentation:style-name="a109" draw:name="Datumsplatzhalter 2" svg:x="4.24826in" svg:y="0in" svg:width="3.25in" svg:height="0.50174in" presentation:class="date-time" presentation:placeholder="false">
          <draw:text-box>
            <text:p text:style-name="a108" text:class-names="" text:cond-style-name=""><text:span text:style-name="a105" text:class-names=""><text:date text:fixed="false" style:data-style-name="a106">05.06.2026</text:date></text:span><text:span text:style-name="a10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10" draw:name="Folienbildplatzhalter 3">
          <svg:title/>
          <svg:desc/>
        </draw:page-thumbnail>
        <draw:frame draw:id="id5" presentation:style-name="a125" draw:name="Notizenplatzhalter 4" svg:x="0.75in" svg:y="4.8125in" svg:width="6in" svg:height="3.9375in" presentation:class="notes" presentation:placeholder="false">
          <draw:text-box>
            <text:p text:style-name="a112" text:class-names="" text:cond-style-name=""><text:span text:style-name="a111" text:class-names="">Mastertextformat bearbeiten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Zweite Ebene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8" draw:name="Fußzeilenplatzhalter 5" svg:x="0in" svg:y="9.49826in" svg:width="3.25in" svg:height="0.50174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7" presentation:style-name="a132" draw:name="Foliennummernplatzhalter 6" svg:x="4.24826in" svg:y="9.49826in" svg:width="3.25in" svg:height="0.50174in" presentation:class="page-number" presentation:placeholder="false">
          <draw:text-box>
  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  </draw:text-box>
          <svg:title/>
          <svg:desc/>
        </draw:frame>
      </presentation:notes>
    </style:master-page>
    <style:master-page style:name="Master1-Layout3-cust-2_chapter_title" style:page-layout-name="pageLayout1" draw:style-name="a134">
      <draw:frame draw:id="id19" draw:layer="Master1-bg" draw:style-name="a135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20" presentation:style-name="a140" draw:name="Datumsplatzhalter 3" svg:x="0.42391in" svg:y="6.95139in" svg:width="3in" svg:height="0.39931in" presentation:class="date-time" presentation:placeholder="false">
        <draw:text-box>
          <text:p text:style-name="a139" text:class-names="" text:cond-style-name=""><text:span text:style-name="a136" text:class-names=""><text:date text:fixed="false" style:data-style-name="a137">05.06.2026</text:date></text:span><text:span text:style-name="a138" text:class-names=""/></text:p>
        </draw:text-box>
        <svg:title/>
        <svg:desc/>
      </draw:frame>
      <draw:frame draw:id="id21" presentation:style-name="a143" draw:name="Fußzeilenplatzhalter 4" svg:x="4.41667in" svg:y="6.95139in" svg:width="4.5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2" presentation:style-name="a147" draw:name="Foliennummernplatzhalter 5" svg:x="10.03128in" svg:y="6.95139in" svg:width="2.93574in" svg:height="0.39931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>‹#›</text:page-number></text:span><text:span text:style-name="a145" text:class-names=""/></text:p>
        </draw:text-box>
        <svg:title/>
        <svg:desc/>
      </draw:frame>
      <draw:frame draw:id="id23" presentation:style-name="a151" draw:name="Title 8" svg:x="0.61417in" svg:y="0.78346in" svg:width="9.11461in" svg:height="0.52362in" presentation:class="title" presentation:placeholder="false">
        <draw:text-box>
          <text:p text:style-name="a150" text:class-names="" text:cond-style-name=""><text:span text:style-name="a148" text:class-names="">Click to edit Master title style</text:span><text:span text:style-name="a149" text:class-names=""/></text:p>
        </draw:text-box>
        <svg:title/>
        <svg:desc/>
      </draw:frame>
      <draw:custom-shape svg:x="0in" svg:y="0.75in" svg:width="0.08333in" svg:height="0.59028in" draw:id="id24" draw:style-name="a154" draw:name="Rectangle 1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58" draw:name="Bildplatzhalter 8" svg:x="0in" svg:y="2.00063in" svg:width="13.33333in" svg:height="4.43073in" presentation:class="graphic" presentation:placeholder="false">
        <draw:text-box>
          <text:p text:style-name="a157" text:class-names="" text:cond-style-name=""><text:span text:style-name="a155" text:class-names="">Click icon to add picture</text:span><text:span text:style-name="a156" text:class-names=""/></text:p>
        </draw:text-box>
        <svg:title/>
        <svg:desc/>
      </draw:frame>
      <presentation:notes style:page-layout-name="pageLayout2" draw:style-name="a190">
        <draw:frame draw:id="id2" presentation:style-name="a161" draw:name="Kopfzeilenplatzhalter 1" svg:x="0in" svg:y="0in" svg:width="3.25in" svg:height="0.50174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3" presentation:style-name="a166" draw:name="Datumsplatzhalt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2" text:class-names=""><text:date text:fixed="false" style:data-style-name="a163">05.06.2026</text:date></text:span><text:span text:style-name="a16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67" draw:name="Folienbildplatzhalter 3">
          <svg:title/>
          <svg:desc/>
        </draw:page-thumbnail>
        <draw:frame draw:id="id5" presentation:style-name="a182" draw:name="Notizenplatzhalt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Mastertextformat bearbeiten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Zweite Ebene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5" draw:name="Fußzeilenplatzhalt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7" presentation:style-name="a189" draw:name="Foliennummernplatzhalt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#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4-cust-3_chapter_title" style:page-layout-name="pageLayout1" draw:style-name="a191">
      <draw:frame draw:id="id26" draw:layer="Master1-bg" draw:style-name="a192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27" presentation:style-name="a196" draw:name="Title 8" svg:x="0.61417in" svg:y="0.78346in" svg:width="9.11461in" svg:height="0.52362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custom-shape svg:x="0in" svg:y="0.75in" svg:width="0.08333in" svg:height="0.59028in" draw:id="id28" draw:style-name="a199" draw:name="Rectangle 1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203" draw:name="Bildplatzhalter 8" svg:x="0in" svg:y="2.14028in" svg:width="13.33333in" svg:height="3.84444in" presentation:class="graphic" presentation:placeholder="false">
        <draw:text-box>
          <text:p text:style-name="a202" text:class-names="" text:cond-style-name=""><text:span text:style-name="a200" text:class-names="">Click icon to add picture</text:span><text:span text:style-name="a201" text:class-names=""/></text:p>
        </draw:text-box>
        <svg:title/>
        <svg:desc/>
      </draw:frame>
      <presentation:notes style:page-layout-name="pageLayout2" draw:style-name="a235">
        <draw:frame draw:id="id2" presentation:style-name="a206" draw:name="Kopfzeilenplatzhalt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3" presentation:style-name="a211" draw:name="Datumsplatzhalt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05.06.2026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12" draw:name="Folienbildplatzhalter 3">
          <svg:title/>
          <svg:desc/>
        </draw:page-thumbnail>
        <draw:frame draw:id="id5" presentation:style-name="a227" draw:name="Notizenplatzhalt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Mastertextformat bearbeiten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Zweite Ebene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30" draw:name="Fußzeilenplatzhalt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7" presentation:style-name="a234" draw:name="Foliennummernplatzhalter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1" text:class-names=""><text:page-number style:num-format="1" text:fixed="false">‹#›</text:page-number></text:span><text:span text:style-name="a232" text:class-names=""/></text:p>
          </draw:text-box>
          <svg:title/>
          <svg:desc/>
        </draw:frame>
      </presentation:notes>
    </style:master-page>
    <style:master-page style:name="Master1-Layout5-cust-5_one_column_one_picture" style:page-layout-name="pageLayout1" draw:style-name="a236">
      <draw:frame draw:id="id30" draw:layer="Master1-bg" draw:style-name="a237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31" presentation:style-name="a241" draw:name="Title Placeholder 7" svg:x="0.61417in" svg:y="0.78346in" svg:width="9.11461in" svg:height="0.5236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custom-shape svg:x="0in" svg:y="0.75in" svg:width="0.08333in" svg:height="0.59028in" draw:id="id32" draw:style-name="a244" draw:name="Rectangle 10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61" draw:name="Text Placeholder 13" svg:x="0.61417in" svg:y="1.64286in" svg:width="4.19445in" svg:height="4.6890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5" draw:name="Picture Placeholder 21" svg:x="6.43576in" svg:y="1.64557in" svg:width="6.89757in" svg:height="5.41259in" presentation:class="graphic" presentation:placeholder="false">
        <draw:text-box>
          <text:p text:style-name="a264" text:class-names="" text:cond-style-name=""><text:span text:style-name="a262" text:class-names="">Click icon to add picture</text:span><text:span text:style-name="a263" text:class-names=""/></text:p>
        </draw:text-box>
        <svg:title/>
        <svg:desc/>
      </draw:frame>
      <draw:connector draw:type="line" svg:x1="6.43411in" svg:y1="1.93304in" svg:x2="6.43411in" svg:y2="6.93924in" draw:id="id35" draw:style-name="a266" draw:name="Google Shape;803;p31">
        <svg:title/>
        <svg:desc/>
      </draw:connector>
      <presentation:notes style:page-layout-name="pageLayout2" draw:style-name="a298">
        <draw:frame draw:id="id2" presentation:style-name="a269" draw:name="Kopfzeilenplatzhalter 1" svg:x="0in" svg:y="0in" svg:width="3.25in" svg:height="0.50174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3" presentation:style-name="a274" draw:name="Datumsplatzhalter 2" svg:x="4.24826in" svg:y="0in" svg:width="3.25in" svg:height="0.50174in" presentation:class="date-time" presentation:placeholder="false">
          <draw:text-box>
            <text:p text:style-name="a273" text:class-names="" text:cond-style-name=""><text:span text:style-name="a270" text:class-names=""><text:date text:fixed="false" style:data-style-name="a271">05.06.2026</text:date></text:span><text:span text:style-name="a27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75" draw:name="Folienbildplatzhalter 3">
          <svg:title/>
          <svg:desc/>
        </draw:page-thumbnail>
        <draw:frame draw:id="id5" presentation:style-name="a290" draw:name="Notizenplatzhalter 4" svg:x="0.75in" svg:y="4.8125in" svg:width="6in" svg:height="3.9375in" presentation:class="notes" presentation:placeholder="false">
          <draw:text-box>
            <text:p text:style-name="a277" text:class-names="" text:cond-style-name=""><text:span text:style-name="a276" text:class-names="">Mastertextformat bearbeiten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8" text:class-names="">Zweite Ebene</text:span></text:p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p text:style-name="a282" text:class-names="" text:cond-style-name=""><text:span text:style-name="a2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p text:style-name="a285" text:class-names="" text:cond-style-name=""><text:span text:style-name="a2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list text:style-name="a289">
                              <text:list-item>
                                <text:p text:style-name="a288" text:class-names="" text:cond-style-name=""><text:span text:style-name="a28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93" draw:name="Fußzeilenplatzhalter 5" svg:x="0in" svg:y="9.49826in" svg:width="3.25in" svg:height="0.50174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7" presentation:style-name="a297" draw:name="Foliennummernplatzhalter 6" svg:x="4.24826in" svg:y="9.49826in" svg:width="3.25in" svg:height="0.50174in" presentation:class="page-number" presentation:placeholder="false">
          <draw:text-box>
  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  </draw:text-box>
          <svg:title/>
          <svg:desc/>
        </draw:frame>
      </presentation:notes>
    </style:master-page>
    <style:master-page style:name="Master1-Layout6-cust-6_two_columns_wide_picture-A" style:page-layout-name="pageLayout1" draw:style-name="a299">
      <draw:frame draw:id="id36" draw:layer="Master1-bg" draw:style-name="a300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37" presentation:style-name="a304" draw:name="Title Placeholder 7" svg:x="0.61417in" svg:y="0.78346in" svg:width="9.11461in" svg:height="0.52362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custom-shape svg:x="0in" svg:y="0.75in" svg:width="0.08333in" svg:height="0.59028in" draw:id="id38" draw:style-name="a307" draw:name="Rectangle 10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1" draw:name="Picture Placeholder 21" svg:x="0.61417in" svg:y="4.29095in" svg:width="12.10392in" svg:height="2.6772in" presentation:class="graphic" presentation:placeholder="false">
        <draw:text-box>
          <text:p text:style-name="a310" text:class-names="" text:cond-style-name=""><text:span text:style-name="a308" text:class-names="">Click icon to add picture</text:span><text:span text:style-name="a309" text:class-names=""/></text:p>
        </draw:text-box>
        <svg:title/>
        <svg:desc/>
      </draw:frame>
      <draw:frame draw:id="id40" presentation:style-name="a328" draw:name="Text Placeholder 13" svg:x="0.61417in" svg:y="1.65423in" svg:width="6.78265in" svg:height="2.1681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5" draw:name="Text Placeholder 13" svg:x="7.47115in" svg:y="1.65423in" svg:width="5.24694in" svg:height="2.168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77">
        <draw:frame draw:id="id2" presentation:style-name="a348" draw:name="Kopfzeilenplatzhalter 1" svg:x="0in" svg:y="0in" svg:width="3.25in" svg:height="0.50174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3" presentation:style-name="a353" draw:name="Datumsplatzhalter 2" svg:x="4.24826in" svg:y="0in" svg:width="3.25in" svg:height="0.50174in" presentation:class="date-time" presentation:placeholder="false">
          <draw:text-box>
            <text:p text:style-name="a352" text:class-names="" text:cond-style-name=""><text:span text:style-name="a349" text:class-names=""><text:date text:fixed="false" style:data-style-name="a350">05.06.2026</text:date></text:span><text:span text:style-name="a35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354" draw:name="Folienbildplatzhalter 3">
          <svg:title/>
          <svg:desc/>
        </draw:page-thumbnail>
        <draw:frame draw:id="id5" presentation:style-name="a369" draw:name="Notizenplatzhalter 4" svg:x="0.75in" svg:y="4.8125in" svg:width="6in" svg:height="3.9375in" presentation:class="notes" presentation:placeholder="false">
          <draw:text-box>
            <text:p text:style-name="a356" text:class-names="" text:cond-style-name=""><text:span text:style-name="a355" text:class-names="">Mastertextformat bearbeiten</text:span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Zweite Ebene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list text:style-name="a368">
                              <text:list-item>
                                <text:p text:style-name="a367" text:class-names="" text:cond-style-name=""><text:span text:style-name="a3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72" draw:name="Fußzeilenplatzhalter 5" svg:x="0in" svg:y="9.49826in" svg:width="3.25in" svg:height="0.50174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6" draw:name="Foliennummernplatzhalt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  </draw:text-box>
          <svg:title/>
          <svg:desc/>
        </draw:frame>
      </presentation:notes>
    </style:master-page>
    <style:master-page style:name="Master1-Layout7-cust-7_two_main_sides_with_line" style:page-layout-name="pageLayout1" draw:style-name="a378">
      <draw:frame draw:id="id42" draw:layer="Master1-bg" draw:style-name="a379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43" presentation:style-name="a382" draw:name="Title Placeholder 7" svg:x="0.61417in" svg:y="0.78346in" svg:width="5.30497in" svg:height="0.52362in" presentation:class="title" presentation:placeholder="false">
        <draw:text-box>
          <text:p text:style-name="a381" text:class-names="" text:cond-style-name=""><text:span text:style-name="a380" text:class-names="">Click to add title</text:span></text:p>
        </draw:text-box>
        <svg:title/>
        <svg:desc/>
      </draw:frame>
      <draw:custom-shape svg:x="0in" svg:y="0.75in" svg:width="0.08333in" svg:height="0.59028in" draw:id="id44" draw:style-name="a385" draw:name="Rectangle 10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8926in" svg:y1="4.72391in" svg:x2="5.47093in" svg:y2="4.72391in" draw:id="id45" draw:style-name="a386" draw:name="Google Shape;673;p26">
        <svg:title/>
        <svg:desc/>
      </draw:connector>
      <draw:custom-shape svg:x="6.65798in" svg:y="0.00105in" svg:width="0.00394in" svg:height="7.5in" draw:id="id46" draw:style-name="a389" draw:name="Google Shape;676;p26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7.28406in" svg:y1="4.72391in" svg:x2="12.06572in" svg:y2="4.72391in" draw:id="id47" draw:style-name="a390" draw:name="Google Shape;703;p26">
        <svg:title/>
        <svg:desc/>
      </draw:connector>
      <draw:custom-shape svg:x="6.66135in" svg:y="0.75441in" svg:width="0.08333in" svg:height="0.59028in" draw:id="id48" draw:style-name="a393" draw:name="Google Shape;674;p26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0" draw:name="Text Placeholder 13" svg:x="0.61417in" svg:y="1.64286in" svg:width="5.31365in" svg:height="2.97822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ifth le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27" draw:name="Text Placeholder 13" svg:x="7.39207in" svg:y="1.64173in" svg:width="5.31365in" svg:height="2.97822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ck to edit Master text styles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cond le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hird le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Fifth level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1" draw:name="Text Placeholder 15" svg:x="7.40551in" svg:y="0.78346in" svg:width="5.31365in" svg:height="0.51979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to add title</text:span></text:p>
            </text:list-item>
          </text:list>
        </draw:text-box>
        <svg:title/>
        <svg:desc/>
      </draw:frame>
      <presentation:notes style:page-layout-name="pageLayout2" draw:style-name="a463">
        <draw:frame draw:id="id2" presentation:style-name="a434" draw:name="Kopfzeilenplatzhalter 1" svg:x="0in" svg:y="0in" svg:width="3.25in" svg:height="0.50174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3" presentation:style-name="a439" draw:name="Datumsplatzhalt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5" text:class-names=""><text:date text:fixed="false" style:data-style-name="a436">05.06.2026</text:date></text:span><text:span text:style-name="a43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440" draw:name="Folienbildplatzhalter 3">
          <svg:title/>
          <svg:desc/>
        </draw:page-thumbnail>
        <draw:frame draw:id="id5" presentation:style-name="a455" draw:name="Notizenplatzhalt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Mastertextformat bearbeiten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Zweite Ebene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58" draw:name="Fußzeilenplatzhalt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7" presentation:style-name="a462" draw:name="Foliennummernplatzhalt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  </draw:text-box>
          <svg:title/>
          <svg:desc/>
        </draw:frame>
      </presentation:notes>
    </style:master-page>
    <style:master-page style:name="Master1-Layout8-cust-7_two_main_sides_with_line_picture" style:page-layout-name="pageLayout1" draw:style-name="a464">
      <draw:frame draw:id="id52" draw:layer="Master1-bg" draw:style-name="a465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53" presentation:style-name="a468" draw:name="Title Placeholder 7" svg:x="0.61417in" svg:y="0.78346in" svg:width="5.30497in" svg:height="0.52362in" presentation:class="title" presentation:placeholder="false">
        <draw:text-box>
          <text:p text:style-name="a467" text:class-names="" text:cond-style-name=""><text:span text:style-name="a466" text:class-names="">Click to add title</text:span></text:p>
        </draw:text-box>
        <svg:title/>
        <svg:desc/>
      </draw:frame>
      <draw:custom-shape svg:x="0in" svg:y="0.75in" svg:width="0.08333in" svg:height="0.59028in" draw:id="id54" draw:style-name="a471" draw:name="Rectangle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8926in" svg:y1="4.72391in" svg:x2="5.47093in" svg:y2="4.72391in" draw:id="id55" draw:style-name="a472" draw:name="Google Shape;673;p26">
        <svg:title/>
        <svg:desc/>
      </draw:connector>
      <draw:custom-shape svg:x="6.65798in" svg:y="0.00105in" svg:width="0.00394in" svg:height="7.5in" draw:id="id56" draw:style-name="a475" draw:name="Google Shape;676;p26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7.28406in" svg:y1="4.72391in" svg:x2="12.06572in" svg:y2="4.72391in" draw:id="id57" draw:style-name="a476" draw:name="Google Shape;703;p26">
        <svg:title/>
        <svg:desc/>
      </draw:connector>
      <draw:custom-shape svg:x="6.66135in" svg:y="0.75441in" svg:width="0.08333in" svg:height="0.59028in" draw:id="id58" draw:style-name="a479" draw:name="Google Shape;674;p26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83" draw:name="Picture Placeholder 21" svg:x="6.66667in" svg:y="3.11691in" svg:width="6.66667in" svg:height="4.38309in" presentation:class="graphic" presentation:placeholder="false">
        <draw:text-box>
          <text:p text:style-name="a482" text:class-names="" text:cond-style-name=""><text:span text:style-name="a480" text:class-names="">Click icon to add picture</text:span><text:span text:style-name="a481" text:class-names=""/></text:p>
        </draw:text-box>
        <svg:title/>
        <svg:desc/>
      </draw:frame>
      <draw:frame draw:id="id60" presentation:style-name="a500" draw:name="Text Placeholder 13" svg:x="0.61417in" svg:y="1.64286in" svg:width="5.31365in" svg:height="2.97822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ck to 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Fifth le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17" draw:name="Text Placeholder 13" svg:x="7.39207in" svg:y="1.64173in" svg:width="5.31365in" svg:height="2.97822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  <text:list text:style-name="a506">
            <text:list-item>
              <text:list text:style-name="a506">
                <text:list-item>
                  <text:p text:style-name="a505" text:class-names="" text:cond-style-name=""><text:span text:style-name="a504" text:class-names="">Second level</text:span></text:p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p text:style-name="a508" text:class-names="" text:cond-style-name=""><text:span text:style-name="a507" text:class-names="">Third level</text:span></text:p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p text:style-name="a511" text:class-names="" text:cond-style-name=""><text:span text:style-name="a5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3" text:class-names="">Fifth level</text:span><text:span text:style-name="a5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21" draw:name="Text Placeholder 15" svg:x="7.40551in" svg:y="0.78346in" svg:width="5.31365in" svg:height="0.51979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add title</text:span></text:p>
            </text:list-item>
          </text:list>
        </draw:text-box>
        <svg:title/>
        <svg:desc/>
      </draw:frame>
      <presentation:notes style:page-layout-name="pageLayout2" draw:style-name="a553">
        <draw:frame draw:id="id2" presentation:style-name="a524" draw:name="Kopfzeilenplatzhalter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3" presentation:style-name="a529" draw:name="Datumsplatzhalter 2" svg:x="4.24826in" svg:y="0in" svg:width="3.25in" svg:height="0.50174in" presentation:class="date-time" presentation:placeholder="false">
          <draw:text-box>
            <text:p text:style-name="a528" text:class-names="" text:cond-style-name=""><text:span text:style-name="a525" text:class-names=""><text:date text:fixed="false" style:data-style-name="a526">05.06.2026</text:date></text:span><text:span text:style-name="a52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530" draw:name="Folienbildplatzhalter 3">
          <svg:title/>
          <svg:desc/>
        </draw:page-thumbnail>
        <draw:frame draw:id="id5" presentation:style-name="a545" draw:name="Notizenplatzhalter 4" svg:x="0.75in" svg:y="4.8125in" svg:width="6in" svg:height="3.9375in" presentation:class="notes" presentation:placeholder="false">
          <draw:text-box>
            <text:p text:style-name="a532" text:class-names="" text:cond-style-name=""><text:span text:style-name="a531" text:class-names="">Mastertextformat bearbeiten</text:span></text:p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Zweite Ebene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list text:style-name="a544">
                              <text:list-item>
                                <text:p text:style-name="a543" text:class-names="" text:cond-style-name=""><text:span text:style-name="a5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48" draw:name="Fußzeilenplatzhalter 5" svg:x="0in" svg:y="9.49826in" svg:width="3.25in" svg:height="0.50174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7" presentation:style-name="a552" draw:name="Foliennummernplatzhalt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49" text:class-names=""><text:page-number style:num-format="1" text:fixed="false">‹#›</text:page-number></text:span><text:span text:style-name="a550" text:class-names=""/></text:p>
          </draw:text-box>
          <svg:title/>
          <svg:desc/>
        </draw:frame>
      </presentation:notes>
    </style:master-page>
    <style:master-page style:name="Master1-Layout9-cust-9_half_picture" style:page-layout-name="pageLayout1" draw:style-name="a554">
      <draw:frame draw:id="id63" draw:layer="Master1-bg" draw:style-name="a555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64" presentation:style-name="a559" draw:name="Title Placeholder 7" svg:x="0.61417in" svg:y="0.78346in" svg:width="9.11461in" svg:height="0.52362in" presentation:class="title" presentation:placeholder="false">
        <draw:text-box>
          <text:p text:style-name="a558" text:class-names="" text:cond-style-name=""><text:span text:style-name="a556" text:class-names="">Click to edit Master title style</text:span><text:span text:style-name="a557" text:class-names=""/></text:p>
        </draw:text-box>
        <svg:title/>
        <svg:desc/>
      </draw:frame>
      <draw:custom-shape svg:x="0in" svg:y="0.75in" svg:width="0.08333in" svg:height="0.59028in" draw:id="id65" draw:style-name="a562" draw:name="Rectangle 10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66" draw:name="Picture Placeholder 21" svg:x="6.35672in" svg:y="0.01738in" svg:width="6.97661in" svg:height="7.46525in" presentation:class="graphic" presentation:placeholder="false">
        <draw:text-box>
          <text:p text:style-name="a565" text:class-names="" text:cond-style-name=""><text:span text:style-name="a563" text:class-names="">Click icon to add picture</text:span><text:span text:style-name="a564" text:class-names=""/></text:p>
        </draw:text-box>
        <svg:title/>
        <svg:desc/>
      </draw:frame>
      <draw:frame draw:id="id67" presentation:style-name="a583" draw:name="Text Placeholder 13" svg:x="0.61417in" svg:y="1.64286in" svg:width="4.19445in" svg:height="4.6890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Second level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list text:style-name="a582">
                            <text:list-item>
                              <text:p text:style-name="a581" text:class-names="" text:cond-style-name=""><text:span text:style-name="a579" text:class-names="">Fifth level</text:span><text:span text:style-name="a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15">
        <draw:frame draw:id="id2" presentation:style-name="a586" draw:name="Kopfzeilenplatzhalter 1" svg:x="0in" svg:y="0in" svg:width="3.25in" svg:height="0.50174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3" presentation:style-name="a591" draw:name="Datumsplatzhalt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7" text:class-names=""><text:date text:fixed="false" style:data-style-name="a588">05.06.2026</text:date></text:span><text:span text:style-name="a58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592" draw:name="Folienbildplatzhalter 3">
          <svg:title/>
          <svg:desc/>
        </draw:page-thumbnail>
        <draw:frame draw:id="id5" presentation:style-name="a607" draw:name="Notizenplatzhalt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Mastertextformat bearbeiten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Zweite Ebene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0" draw:name="Fußzeilenplatzhalter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Foliennummernplatzhalt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1" text:class-names=""><text:page-number style:num-format="1" text:fixed="false">‹#›</text:page-number></text:span><text:span text:style-name="a612" text:class-names=""/></text:p>
          </draw:text-box>
          <svg:title/>
          <svg:desc/>
        </draw:frame>
      </presentation:notes>
    </style:master-page>
    <style:master-page style:name="Master1-Layout10-cust-10_one_column" style:page-layout-name="pageLayout1" draw:style-name="a616">
      <draw:frame draw:id="id68" draw:layer="Master1-bg" draw:style-name="a617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69" presentation:style-name="a621" draw:name="Title Placeholder 7" svg:x="0.61417in" svg:y="0.78346in" svg:width="9.11461in" svg:height="0.52362in" presentation:class="title" presentation:placeholder="false">
        <draw:text-box>
          <text:p text:style-name="a620" text:class-names="" text:cond-style-name=""><text:span text:style-name="a618" text:class-names="">Click to edit Master title style</text:span><text:span text:style-name="a619" text:class-names=""/></text:p>
        </draw:text-box>
        <svg:title/>
        <svg:desc/>
      </draw:frame>
      <draw:custom-shape svg:x="0in" svg:y="0.75in" svg:width="0.08333in" svg:height="0.59028in" draw:id="id70" draw:style-name="a624" draw:name="Rectangle 10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641" draw:name="Text Placeholder 13" svg:x="0.61417in" svg:y="1.64286in" svg:width="12.10458in" svg:height="5.18572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  <text:list text:style-name="a630">
            <text:list-item>
              <text:list text:style-name="a630">
                <text:list-item>
                  <text:p text:style-name="a629" text:class-names="" text:cond-style-name=""><text:span text:style-name="a628" text:class-names="">Second level</text:span></text:p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p text:style-name="a632" text:class-names="" text:cond-style-name=""><text:span text:style-name="a631" text:class-names="">Third level</text:span></text:p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p text:style-name="a635" text:class-names="" text:cond-style-name=""><text:span text:style-name="a6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list text:style-name="a640">
                            <text:list-item>
                              <text:p text:style-name="a639" text:class-names="" text:cond-style-name=""><text:span text:style-name="a637" text:class-names="">Fifth level</text:span><text:span text:style-name="a6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73">
        <draw:frame draw:id="id2" presentation:style-name="a644" draw:name="Kopfzeilenplatzhalter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3" presentation:style-name="a649" draw:name="Datumsplatzhalter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>05.06.2026</text:date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650" draw:name="Folienbildplatzhalter 3">
          <svg:title/>
          <svg:desc/>
        </draw:page-thumbnail>
        <draw:frame draw:id="id5" presentation:style-name="a665" draw:name="Notizenplatzhalter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Mastertextformat bearbeiten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Zweite Ebene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68" draw:name="Fußzeilenplatzhalter 5" svg:x="0in" svg:y="9.49826in" svg:width="3.25in" svg:height="0.50174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7" presentation:style-name="a672" draw:name="Foliennummernplatzhalt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69" text:class-names=""><text:page-number style:num-format="1" text:fixed="false">‹#›</text:page-number></text:span><text:span text:style-name="a670" text:class-names=""/></text:p>
          </draw:text-box>
          <svg:title/>
          <svg:desc/>
        </draw:frame>
      </presentation:notes>
    </style:master-page>
    <style:master-page style:name="Master1-Layout11-cust-11_two_columns_wide_picture-B" style:page-layout-name="pageLayout1" draw:style-name="a674">
      <draw:frame draw:id="id72" draw:layer="Master1-bg" draw:style-name="a675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73" presentation:style-name="a679" draw:name="Title 1" svg:x="0.61417in" svg:y="0.78346in" svg:width="9.11461in" svg:height="0.52362in" presentation:class="title" presentation:placeholder="false">
        <draw:text-box>
          <text:p text:style-name="a678" text:class-names="" text:cond-style-name=""><text:span text:style-name="a676" text:class-names="">Click to edit Master title style</text:span><text:span text:style-name="a677" text:class-names=""/></text:p>
        </draw:text-box>
        <svg:title/>
        <svg:desc/>
      </draw:frame>
      <draw:custom-shape svg:x="0in" svg:y="0.75in" svg:width="0.08333in" svg:height="0.59028in" draw:id="id74" draw:style-name="a682" draw:name="Rectangle 5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686" draw:name="Bildplatzhalter 8" svg:x="0.61417in" svg:y="3.85443in" svg:width="12.35284in" svg:height="2.57692in" presentation:class="graphic" presentation:placeholder="false">
        <draw:text-box>
          <text:p text:style-name="a685" text:class-names="" text:cond-style-name=""><text:span text:style-name="a683" text:class-names="">Click icon to add picture</text:span><text:span text:style-name="a684" text:class-names=""/></text:p>
        </draw:text-box>
        <svg:title/>
        <svg:desc/>
      </draw:frame>
      <draw:frame draw:id="id76" presentation:style-name="a703" draw:name="Text Placeholder 13" svg:x="0.61417in" svg:y="1.64286in" svg:width="7.70187in" svg:height="2.1681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ck to edit Master text styles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Second level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hird level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Fifth level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20" draw:name="Text Placeholder 13" svg:x="8.5443in" svg:y="1.64286in" svg:width="4.42271in" svg:height="2.1681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Fifth le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2">
        <draw:frame draw:id="id2" presentation:style-name="a723" draw:name="Kopfzeilenplatzhalter 1" svg:x="0in" svg:y="0in" svg:width="3.25in" svg:height="0.50174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3" presentation:style-name="a728" draw:name="Datumsplatzhalter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4" text:class-names=""><text:date text:fixed="false" style:data-style-name="a725">05.06.2026</text:date></text:span><text:span text:style-name="a726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29" draw:name="Folienbildplatzhalter 3">
          <svg:title/>
          <svg:desc/>
        </draw:page-thumbnail>
        <draw:frame draw:id="id5" presentation:style-name="a744" draw:name="Notizenplatzhalter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Mastertextformat bearbeiten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Zweite Ebene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7" draw:name="Fußzeilenplatzhalter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7" presentation:style-name="a751" draw:name="Foliennummernplatzhalter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>‹#›</text:page-number></text:span><text:span text:style-name="a749" text:class-names=""/></text:p>
          </draw:text-box>
          <svg:title/>
          <svg:desc/>
        </draw:frame>
      </presentation:notes>
    </style:master-page>
    <style:master-page style:name="Master1-Layout12-cust-12_two_columns_wide_picture_chart" style:page-layout-name="pageLayout1" draw:style-name="a753">
      <draw:frame draw:id="id78" draw:layer="Master1-bg" draw:style-name="a754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79" presentation:style-name="a758" draw:name="Title 1" svg:x="0.61417in" svg:y="0.78346in" svg:width="9.11461in" svg:height="0.52362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custom-shape svg:x="0in" svg:y="0.75in" svg:width="0.08333in" svg:height="0.59028in" draw:id="id80" draw:style-name="a761" draw:name="Rectangle 5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765" draw:name="Bildplatzhalter 8" svg:x="0.61417in" svg:y="4.6129in" svg:width="12.35284in" svg:height="1.81845in" presentation:class="graphic" presentation:placeholder="false">
        <draw:text-box>
          <text:p text:style-name="a764" text:class-names="" text:cond-style-name=""><text:span text:style-name="a762" text:class-names="">Click icon to add picture</text:span><text:span text:style-name="a763" text:class-names=""/></text:p>
        </draw:text-box>
        <svg:title/>
        <svg:desc/>
      </draw:frame>
      <draw:frame draw:id="id82" presentation:style-name="a782" draw:name="Text Placeholder 13" svg:x="0.61417in" svg:y="1.64286in" svg:width="4.34375in" svg:height="2.97822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Click to edit Master text styles</text:span></text:p>
            </text:list-item>
          </text:list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Second level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list text:style-name="a781">
                            <text:list-item>
                              <text:p text:style-name="a780" text:class-names="" text:cond-style-name=""><text:span text:style-name="a778" text:class-names="">Fifth level</text:span><text:span text:style-name="a7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99" draw:name="Text Placeholder 13" svg:x="5.13889in" svg:y="1.64286in" svg:width="4.5899in" svg:height="2.9782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ck to 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5" text:class-names="">Fifth level</text:span><text:span text:style-name="a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1">
        <draw:frame draw:id="id2" presentation:style-name="a802" draw:name="Kopfzeilenplatzhalter 1" svg:x="0in" svg:y="0in" svg:width="3.25in" svg:height="0.50174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3" presentation:style-name="a807" draw:name="Datumsplatzhalter 2" svg:x="4.24826in" svg:y="0in" svg:width="3.25in" svg:height="0.50174in" presentation:class="date-time" presentation:placeholder="false">
          <draw:text-box>
            <text:p text:style-name="a806" text:class-names="" text:cond-style-name=""><text:span text:style-name="a803" text:class-names=""><text:date text:fixed="false" style:data-style-name="a804">05.06.2026</text:date></text:span><text:span text:style-name="a80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808" draw:name="Folienbildplatzhalter 3">
          <svg:title/>
          <svg:desc/>
        </draw:page-thumbnail>
        <draw:frame draw:id="id5" presentation:style-name="a823" draw:name="Notizenplatzhalter 4" svg:x="0.75in" svg:y="4.8125in" svg:width="6in" svg:height="3.9375in" presentation:class="notes" presentation:placeholder="false">
          <draw:text-box>
            <text:p text:style-name="a810" text:class-names="" text:cond-style-name=""><text:span text:style-name="a809" text:class-names="">Mastertextformat bearbeiten</text:span></text:p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Zweite Ebene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p text:style-name="a815" text:class-names="" text:cond-style-name=""><text:span text:style-name="a8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p text:style-name="a818" text:class-names="" text:cond-style-name=""><text:span text:style-name="a8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list text:style-name="a822">
                              <text:list-item>
                                <text:p text:style-name="a821" text:class-names="" text:cond-style-name=""><text:span text:style-name="a8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26" draw:name="Fußzeilenplatzhalter 5" svg:x="0in" svg:y="9.49826in" svg:width="3.25in" svg:height="0.50174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7" presentation:style-name="a830" draw:name="Foliennummernplatzhalter 6" svg:x="4.24826in" svg:y="9.49826in" svg:width="3.25in" svg:height="0.50174in" presentation:class="page-number" presentation:placeholder="false">
          <draw:text-box>
            <text:p text:style-name="a829" text:class-names="" text:cond-style-name=""><text:span text:style-name="a827" text:class-names=""><text:page-number style:num-format="1" text:fixed="false">‹#›</text:page-number></text:span><text:span text:style-name="a828" text:class-names=""/></text:p>
          </draw:text-box>
          <svg:title/>
          <svg:desc/>
        </draw:frame>
      </presentation:notes>
    </style:master-page>
    <style:master-page style:name="Master1-Layout13-cust-13_product_description" style:page-layout-name="pageLayout1" draw:style-name="a832">
      <draw:frame draw:id="id84" draw:layer="Master1-bg" draw:style-name="a833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85" presentation:style-name="a837" draw:name="Title Placeholder 7" svg:x="0.61417in" svg:y="0.78346in" svg:width="9.11461in" svg:height="0.52362in" presentation:class="title" presentation:placeholder="false">
        <draw:text-box>
          <text:p text:style-name="a836" text:class-names="" text:cond-style-name=""><text:span text:style-name="a834" text:class-names="">Click to edit Master title style</text:span><text:span text:style-name="a835" text:class-names=""/></text:p>
        </draw:text-box>
        <svg:title/>
        <svg:desc/>
      </draw:frame>
      <draw:custom-shape svg:x="0in" svg:y="0.75in" svg:width="0.08333in" svg:height="0.59028in" draw:id="id86" draw:style-name="a840" draw:name="Rectangle 10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844" draw:name="Picture Placeholder 21" svg:x="6.43576in" svg:y="4.49206in" svg:width="6.89757in" svg:height="2.56609in" presentation:class="graphic" presentation:placeholder="false">
        <draw:text-box>
          <text:p text:style-name="a843" text:class-names="" text:cond-style-name=""><text:span text:style-name="a841" text:class-names="">Click icon to add picture</text:span><text:span text:style-name="a842" text:class-names=""/></text:p>
        </draw:text-box>
        <svg:title/>
        <svg:desc/>
      </draw:frame>
      <draw:frame draw:id="id88" presentation:style-name="a861" draw:name="Text Placeholder 13" svg:x="0.61417in" svg:y="1.64286in" svg:width="4.19445in" svg:height="4.68904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edit Master text styles</text:span></text:p>
            </text:list-item>
          </text:list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Second level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hird level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ifth level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878" draw:name="Text Placeholder 13" svg:x="6.43576in" svg:y="1.64286in" svg:width="6.28298in" svg:height="2.40714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Click to edit Master text styles</text:span></text:p>
            </text:list-item>
          </text:list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cond level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hird level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ifth level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10">
        <draw:frame draw:id="id2" presentation:style-name="a881" draw:name="Kopfzeilenplatzhalter 1" svg:x="0in" svg:y="0in" svg:width="3.25in" svg:height="0.50174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3" presentation:style-name="a886" draw:name="Datumsplatzhalter 2" svg:x="4.24826in" svg:y="0in" svg:width="3.25in" svg:height="0.50174in" presentation:class="date-time" presentation:placeholder="false">
          <draw:text-box>
            <text:p text:style-name="a885" text:class-names="" text:cond-style-name=""><text:span text:style-name="a882" text:class-names=""><text:date text:fixed="false" style:data-style-name="a883">05.06.2026</text:date></text:span><text:span text:style-name="a88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887" draw:name="Folienbildplatzhalter 3">
          <svg:title/>
          <svg:desc/>
        </draw:page-thumbnail>
        <draw:frame draw:id="id5" presentation:style-name="a902" draw:name="Notizenplatzhalter 4" svg:x="0.75in" svg:y="4.8125in" svg:width="6in" svg:height="3.9375in" presentation:class="notes" presentation:placeholder="false">
          <draw:text-box>
            <text:p text:style-name="a889" text:class-names="" text:cond-style-name=""><text:span text:style-name="a888" text:class-names="">Mastertextformat bearbeiten</text:span></text:p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Zweite Ebene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p text:style-name="a894" text:class-names="" text:cond-style-name=""><text:span text:style-name="a8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list text:style-name="a898">
                          <text:list-item>
                            <text:p text:style-name="a897" text:class-names="" text:cond-style-name=""><text:span text:style-name="a8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5" draw:name="Fußzeilenplatzhalter 5" svg:x="0in" svg:y="9.49826in" svg:width="3.25in" svg:height="0.50174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7" presentation:style-name="a909" draw:name="Foliennummernplatzhalter 6" svg:x="4.24826in" svg:y="9.49826in" svg:width="3.25in" svg:height="0.50174in" presentation:class="page-number" presentation:placeholder="false">
          <draw:text-box>
            <text:p text:style-name="a908" text:class-names="" text:cond-style-name=""><text:span text:style-name="a906" text:class-names=""><text:page-number style:num-format="1" text:fixed="false">‹#›</text:page-number></text:span><text:span text:style-name="a907" text:class-names=""/></text:p>
          </draw:text-box>
          <svg:title/>
          <svg:desc/>
        </draw:frame>
      </presentation:notes>
    </style:master-page>
    <style:master-page style:name="Master1-Layout14-cust-14_title_subtitle" style:page-layout-name="pageLayout1" draw:style-name="a911">
      <draw:frame draw:id="id90" draw:layer="Master1-bg" draw:style-name="a912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91" presentation:style-name="a916" draw:name="Title 8" svg:x="0.61417in" svg:y="0.78346in" svg:width="9.11461in" svg:height="0.52362in" presentation:class="title" presentation:placeholder="false">
        <draw:text-box>
          <text:p text:style-name="a915" text:class-names="" text:cond-style-name=""><text:span text:style-name="a913" text:class-names="">Click to edit Master title style</text:span><text:span text:style-name="a914" text:class-names=""/></text:p>
        </draw:text-box>
        <svg:title/>
        <svg:desc/>
      </draw:frame>
      <draw:custom-shape svg:x="0in" svg:y="0.75in" svg:width="0.08333in" svg:height="0.59028in" draw:id="id92" draw:style-name="a919" draw:name="Rectangle 13">
        <svg:title/>
        <svg:desc/>
        <text:p text:style-name="a918" text:class-names="" text:cond-style-name=""><text:span text:style-name="a9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presentation:style-name="a936" draw:name="Text Placeholder 13" svg:x="0.61417in" svg:y="1.64286in" svg:width="9.11461in" svg:height="2.16923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Click to edit Master text styles</text:span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3" text:class-names="">Second level</text:span></text:p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p text:style-name="a927" text:class-names="" text:cond-style-name=""><text:span text:style-name="a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p text:style-name="a930" text:class-names="" text:cond-style-name=""><text:span text:style-name="a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list text:style-name="a935">
                        <text:list-item>
                          <text:list text:style-name="a935">
                            <text:list-item>
                              <text:p text:style-name="a934" text:class-names="" text:cond-style-name=""><text:span text:style-name="a932" text:class-names="">Fifth level</text:span><text:span text:style-name="a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68">
        <draw:frame draw:id="id2" presentation:style-name="a939" draw:name="Kopfzeilenplatzhalter 1" svg:x="0in" svg:y="0in" svg:width="3.25in" svg:height="0.50174in" presentation:class="head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3" presentation:style-name="a944" draw:name="Datumsplatzhalter 2" svg:x="4.24826in" svg:y="0in" svg:width="3.25in" svg:height="0.50174in" presentation:class="date-time" presentation:placeholder="false">
          <draw:text-box>
            <text:p text:style-name="a943" text:class-names="" text:cond-style-name=""><text:span text:style-name="a940" text:class-names=""><text:date text:fixed="false" style:data-style-name="a941">05.06.2026</text:date></text:span><text:span text:style-name="a94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945" draw:name="Folienbildplatzhalter 3">
          <svg:title/>
          <svg:desc/>
        </draw:page-thumbnail>
        <draw:frame draw:id="id5" presentation:style-name="a960" draw:name="Notizenplatzhalter 4" svg:x="0.75in" svg:y="4.8125in" svg:width="6in" svg:height="3.9375in" presentation:class="notes" presentation:placeholder="false">
          <draw:text-box>
            <text:p text:style-name="a947" text:class-names="" text:cond-style-name=""><text:span text:style-name="a946" text:class-names="">Mastertextformat bearbeiten</text:span></text:p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Zweite Ebene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p text:style-name="a952" text:class-names="" text:cond-style-name=""><text:span text:style-name="a9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list text:style-name="a956">
                          <text:list-item>
                            <text:p text:style-name="a955" text:class-names="" text:cond-style-name=""><text:span text:style-name="a9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list text:style-name="a959">
                              <text:list-item>
                                <text:p text:style-name="a958" text:class-names="" text:cond-style-name=""><text:span text:style-name="a9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63" draw:name="Fußzeilenplatzhalter 5" svg:x="0in" svg:y="9.49826in" svg:width="3.25in" svg:height="0.50174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7" presentation:style-name="a967" draw:name="Foliennummernplatzhalter 6" svg:x="4.24826in" svg:y="9.49826in" svg:width="3.25in" svg:height="0.50174in" presentation:class="page-number" presentation:placeholder="false">
          <draw:text-box>
            <text:p text:style-name="a966" text:class-names="" text:cond-style-name=""><text:span text:style-name="a964" text:class-names=""><text:page-number style:num-format="1" text:fixed="false">‹#›</text:page-number></text:span><text:span text:style-name="a965" text:class-names=""/></text:p>
          </draw:text-box>
          <svg:title/>
          <svg:desc/>
        </draw:frame>
      </presentation:notes>
    </style:master-page>
    <style:master-page style:name="Master1-Layout15-cust-15_title" style:page-layout-name="pageLayout1" draw:style-name="a969">
      <draw:frame draw:id="id94" draw:layer="Master1-bg" draw:style-name="a970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95" presentation:style-name="a974" draw:name="Title 8" svg:x="0.61417in" svg:y="0.78346in" svg:width="9.11461in" svg:height="0.5236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custom-shape svg:x="0in" svg:y="0.75in" svg:width="0.08333in" svg:height="0.59028in" draw:id="id96" draw:style-name="a977" draw:name="Rectangle 1">
        <svg:title/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009">
        <draw:frame draw:id="id2" presentation:style-name="a980" draw:name="Kopfzeilenplatzhalter 1" svg:x="0in" svg:y="0in" svg:width="3.25in" svg:height="0.50174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3" presentation:style-name="a985" draw:name="Datumsplatzhalter 2" svg:x="4.24826in" svg:y="0in" svg:width="3.25in" svg:height="0.50174in" presentation:class="date-time" presentation:placeholder="false">
          <draw:text-box>
            <text:p text:style-name="a984" text:class-names="" text:cond-style-name=""><text:span text:style-name="a981" text:class-names=""><text:date text:fixed="false" style:data-style-name="a982">05.06.2026</text:date></text:span><text:span text:style-name="a983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986" draw:name="Folienbildplatzhalter 3">
          <svg:title/>
          <svg:desc/>
        </draw:page-thumbnail>
        <draw:frame draw:id="id5" presentation:style-name="a1001" draw:name="Notizenplatzhalter 4" svg:x="0.75in" svg:y="4.8125in" svg:width="6in" svg:height="3.9375in" presentation:class="notes" presentation:placeholder="false">
          <draw:text-box>
            <text:p text:style-name="a988" text:class-names="" text:cond-style-name=""><text:span text:style-name="a987" text:class-names="">Mastertextformat bearbeiten</text:span></text:p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Zweite Ebene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p text:style-name="a996" text:class-names="" text:cond-style-name=""><text:span text:style-name="a9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list text:style-name="a1000">
                          <text:list-item>
                            <text:list text:style-name="a1000">
                              <text:list-item>
                                <text:p text:style-name="a999" text:class-names="" text:cond-style-name=""><text:span text:style-name="a9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04" draw:name="Fußzeilenplatzhalter 5" svg:x="0in" svg:y="9.49826in" svg:width="3.25in" svg:height="0.50174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7" presentation:style-name="a1008" draw:name="Foliennummernplatzhalter 6" svg:x="4.24826in" svg:y="9.49826in" svg:width="3.25in" svg:height="0.50174in" presentation:class="page-number" presentation:placeholder="false">
          <draw:text-box>
            <text:p text:style-name="a1007" text:class-names="" text:cond-style-name=""><text:span text:style-name="a1005" text:class-names=""><text:page-number style:num-format="1" text:fixed="false">‹#›</text:page-number></text:span><text:span text:style-name="a1006" text:class-names=""/></text:p>
          </draw:text-box>
          <svg:title/>
          <svg:desc/>
        </draw:frame>
      </presentation:notes>
    </style:master-page>
    <style:master-page style:name="Master1-Layout16-cust-16_title" style:page-layout-name="pageLayout1" draw:style-name="a1010">
      <draw:frame draw:id="id97" draw:layer="Master1-bg" draw:style-name="a1011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98" presentation:style-name="a1015" draw:name="Title 8" svg:x="0.61417in" svg:y="0.78346in" svg:width="9.11461in" svg:height="0.52362in" presentation:class="title" presentation:placeholder="false">
        <draw:text-box>
          <text:p text:style-name="a1014" text:class-names="" text:cond-style-name=""><text:span text:style-name="a1012" text:class-names="">Click to edit Master title style</text:span><text:span text:style-name="a1013" text:class-names=""/></text:p>
        </draw:text-box>
        <svg:title/>
        <svg:desc/>
      </draw:frame>
      <draw:custom-shape svg:x="0in" svg:y="0.75in" svg:width="0.08333in" svg:height="0.59028in" draw:id="id99" draw:style-name="a1018" draw:name="Rectangle 7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1022" draw:name="Table Placeholder 4" svg:x="0.61417in" svg:y="1.72648in" svg:width="9.11461in" svg:height="1.67352in" presentation:class="table" presentation:placeholder="false">
        <draw:text-box>
          <text:p text:style-name="a1021" text:class-names="" text:cond-style-name=""><text:span text:style-name="a1019" text:class-names="">Click icon to add table</text:span><text:span text:style-name="a1020" text:class-names=""/></text:p>
        </draw:text-box>
        <svg:title/>
        <svg:desc/>
      </draw:frame>
      <presentation:notes style:page-layout-name="pageLayout2" draw:style-name="a1054">
        <draw:frame draw:id="id2" presentation:style-name="a1025" draw:name="Kopfzeilenplatzhalter 1" svg:x="0in" svg:y="0in" svg:width="3.25in" svg:height="0.50174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3" presentation:style-name="a1030" draw:name="Datumsplatzhalter 2" svg:x="4.24826in" svg:y="0in" svg:width="3.25in" svg:height="0.50174in" presentation:class="date-time" presentation:placeholder="false">
          <draw:text-box>
            <text:p text:style-name="a1029" text:class-names="" text:cond-style-name=""><text:span text:style-name="a1026" text:class-names=""><text:date text:fixed="false" style:data-style-name="a1027">05.06.2026</text:date></text:span><text:span text:style-name="a102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031" draw:name="Folienbildplatzhalter 3">
          <svg:title/>
          <svg:desc/>
        </draw:page-thumbnail>
        <draw:frame draw:id="id5" presentation:style-name="a1046" draw:name="Notizenplatzhalter 4" svg:x="0.75in" svg:y="4.8125in" svg:width="6in" svg:height="3.9375in" presentation:class="notes" presentation:placeholder="false">
          <draw:text-box>
            <text:p text:style-name="a1033" text:class-names="" text:cond-style-name=""><text:span text:style-name="a1032" text:class-names="">Mastertextformat bearbeiten</text:span></text:p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Zweite Ebene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list text:style-name="a1042">
                          <text:list-item>
                            <text:p text:style-name="a1041" text:class-names="" text:cond-style-name=""><text:span text:style-name="a10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49" draw:name="Fußzeilenplatzhalter 5" svg:x="0in" svg:y="9.49826in" svg:width="3.25in" svg:height="0.50174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7" presentation:style-name="a1053" draw:name="Foliennummernplatzhalter 6" svg:x="4.24826in" svg:y="9.49826in" svg:width="3.25in" svg:height="0.50174in" presentation:class="page-number" presentation:placeholder="false">
          <draw:text-box>
            <text:p text:style-name="a1052" text:class-names="" text:cond-style-name=""><text:span text:style-name="a1050" text:class-names=""><text:page-number style:num-format="1" text:fixed="false">‹#›</text:page-number></text:span><text:span text:style-name="a1051" text:class-names=""/></text:p>
          </draw:text-box>
          <svg:title/>
          <svg:desc/>
        </draw:frame>
      </presentation:notes>
    </style:master-page>
    <style:master-page style:name="Master1-Layout17-cust-17_title" style:page-layout-name="pageLayout1" draw:style-name="a1055">
      <draw:frame draw:id="id101" draw:layer="Master1-bg" draw:style-name="a1056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102" presentation:style-name="a1060" draw:name="Title 8" svg:x="0.61417in" svg:y="0.78346in" svg:width="9.11461in" svg:height="0.52362in" presentation:class="title" presentation:placeholder="false">
        <draw:text-box>
          <text:p text:style-name="a1059" text:class-names="" text:cond-style-name=""><text:span text:style-name="a1057" text:class-names="">Click to edit Master title style</text:span><text:span text:style-name="a1058" text:class-names=""/></text:p>
        </draw:text-box>
        <svg:title/>
        <svg:desc/>
      </draw:frame>
      <draw:custom-shape svg:x="0in" svg:y="0.75in" svg:width="0.08333in" svg:height="0.59028in" draw:id="id103" draw:style-name="a1063" draw:name="Rectangle 7">
        <svg:title/>
        <svg:desc/>
        <text:p text:style-name="a1062" text:class-names="" text:cond-style-name=""><text:span text:style-name="a10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name="Table 2" svg:x="0.61417in" svg:y="1.87125in" svg:width="8.88889in" svg:height="1.62222in">
        <table:table table:style-name="a1064" table:template-name="{93296810-A885-4BE3-A3E7-6D5BEEA58F35}" table:use-banding-columns-styles="false" table:use-banding-rows-styles="true" table:use-first-column-styles="false" table:use-first-row-styles="true" table:use-last-column-styles="false" table:use-last-row-styles="false">
          <table:table-column table:style-name="a1065" table:default-cell-style-name=""/>
          <table:table-column table:style-name="a1066" table:default-cell-style-name=""/>
          <table:table-column table:style-name="a1067" table:default-cell-style-name=""/>
          <table:table-column table:style-name="a1068" table:default-cell-style-name=""/>
          <table:table-column table:style-name="a1069" table:default-cell-style-name=""/>
          <table:table-row table:style-name="a1070" table:default-cell-style-name="">
            <table:table-cell table:style-name="a1074">
              <text:list text:style-name="a1073">
                <text:list-item>
                  <text:p text:style-name="a1072" text:class-names="" text:cond-style-name=""><text:span text:style-name="a1071" text:class-names=""/></text:p>
                </text:list-item>
              </text:list>
            </table:table-cell>
            <table:table-cell table:style-name="a1078">
              <text:list text:style-name="a1077">
                <text:list-item>
                  <text:p text:style-name="a1076" text:class-names="" text:cond-style-name=""><text:span text:style-name="a1075" text:class-names=""/></text:p>
                </text:list-item>
              </text:list>
            </table:table-cell>
            <table:table-cell table:style-name="a1082">
              <text:list text:style-name="a1081">
                <text:list-item>
                  <text:p text:style-name="a1080" text:class-names="" text:cond-style-name=""><text:span text:style-name="a1079" text:class-names=""/></text:p>
                </text:list-item>
              </text:list>
            </table:table-cell>
            <table:table-cell table:style-name="a1086">
              <text:list text:style-name="a1085">
                <text:list-item>
                  <text:p text:style-name="a1084" text:class-names="" text:cond-style-name=""><text:span text:style-name="a1083" text:class-names=""/></text:p>
                </text:list-item>
              </text:list>
            </table:table-cell>
            <table:table-cell table:style-name="a1090">
              <text:list text:style-name="a1089">
                <text:list-item>
                  <text:p text:style-name="a1088" text:class-names="" text:cond-style-name=""><text:span text:style-name="a1087" text:class-names=""/></text:p>
                </text:list-item>
              </text:list>
            </table:table-cell>
          </table:table-row>
          <table:table-row table:style-name="a1091" table:default-cell-style-name="">
            <table:table-cell table:style-name="a1095">
              <text:list text:style-name="a1094">
                <text:list-item>
                  <text:p text:style-name="a1093" text:class-names="" text:cond-style-name=""><text:span text:style-name="a1092" text:class-names=""/></text:p>
                </text:list-item>
              </text:list>
            </table:table-cell>
            <table:table-cell table:style-name="a1099">
              <text:list text:style-name="a1098">
                <text:list-item>
                  <text:p text:style-name="a1097" text:class-names="" text:cond-style-name=""><text:span text:style-name="a1096" text:class-names=""/></text:p>
                </text:list-item>
              </text:list>
            </table:table-cell>
            <table:table-cell table:style-name="a1103">
              <text:list text:style-name="a1102">
                <text:list-item>
                  <text:p text:style-name="a1101" text:class-names="" text:cond-style-name=""><text:span text:style-name="a1100" text:class-names=""/></text:p>
                </text:list-item>
              </text:list>
            </table:table-cell>
            <table:table-cell table:style-name="a1107">
              <text:list text:style-name="a1106">
                <text:list-item>
                  <text:p text:style-name="a1105" text:class-names="" text:cond-style-name=""><text:span text:style-name="a1104" text:class-names=""/></text:p>
                </text:list-item>
              </text:list>
            </table:table-cell>
            <table:table-cell table:style-name="a1111">
              <text:list text:style-name="a1110">
                <text:list-item>
                  <text:p text:style-name="a1109" text:class-names="" text:cond-style-name=""><text:span text:style-name="a1108" text:class-names=""/></text:p>
                </text:list-item>
              </text:list>
            </table:table-cell>
          </table:table-row>
          <table:table-row table:style-name="a1112" table:default-cell-style-name="">
            <table:table-cell table:style-name="a1116">
              <text:list text:style-name="a1115">
                <text:list-item>
                  <text:p text:style-name="a1114" text:class-names="" text:cond-style-name=""><text:span text:style-name="a1113" text:class-names=""/></text:p>
                </text:list-item>
              </text:list>
            </table:table-cell>
            <table:table-cell table:style-name="a1120">
              <text:list text:style-name="a1119">
                <text:list-item>
                  <text:p text:style-name="a1118" text:class-names="" text:cond-style-name=""><text:span text:style-name="a1117" text:class-names=""/></text:p>
                </text:list-item>
              </text:list>
            </table:table-cell>
            <table:table-cell table:style-name="a1124">
              <text:list text:style-name="a1123">
                <text:list-item>
                  <text:p text:style-name="a1122" text:class-names="" text:cond-style-name=""><text:span text:style-name="a1121" text:class-names=""/></text:p>
                </text:list-item>
              </text:list>
            </table:table-cell>
            <table:table-cell table:style-name="a1128">
              <text:list text:style-name="a1127">
                <text:list-item>
                  <text:p text:style-name="a1126" text:class-names="" text:cond-style-name=""><text:span text:style-name="a1125" text:class-names=""/></text:p>
                </text:list-item>
              </text:list>
            </table:table-cell>
            <table:table-cell table:style-name="a1132">
              <text:list text:style-name="a1131">
                <text:list-item>
                  <text:p text:style-name="a1130" text:class-names="" text:cond-style-name=""><text:span text:style-name="a1129" text:class-names=""/></text:p>
                </text:list-item>
              </text:list>
            </table:table-cell>
          </table:table-row>
          <table:table-row table:style-name="a1133" table:default-cell-style-name="">
            <table:table-cell table:style-name="a1137">
              <text:list text:style-name="a1136">
                <text:list-item>
                  <text:p text:style-name="a1135" text:class-names="" text:cond-style-name=""><text:span text:style-name="a1134" text:class-names=""/></text:p>
                </text:list-item>
              </text:list>
            </table:table-cell>
            <table:table-cell table:style-name="a1141">
              <text:list text:style-name="a1140">
                <text:list-item>
                  <text:p text:style-name="a1139" text:class-names="" text:cond-style-name=""><text:span text:style-name="a1138" text:class-names=""/></text:p>
                </text:list-item>
              </text:list>
            </table:table-cell>
            <table:table-cell table:style-name="a1145">
              <text:list text:style-name="a1144">
                <text:list-item>
                  <text:p text:style-name="a1143" text:class-names="" text:cond-style-name=""><text:span text:style-name="a1142" text:class-names=""/></text:p>
                </text:list-item>
              </text:list>
            </table:table-cell>
            <table:table-cell table:style-name="a1149">
              <text:list text:style-name="a1148">
                <text:list-item>
                  <text:p text:style-name="a1147" text:class-names="" text:cond-style-name=""><text:span text:style-name="a1146" text:class-names=""/></text:p>
                </text:list-item>
              </text:list>
            </table:table-cell>
            <table:table-cell table:style-name="a1153">
              <text:list text:style-name="a1152">
                <text:list-item>
                  <text:p text:style-name="a1151" text:class-names="" text:cond-style-name=""><text:span text:style-name="a1150" text:class-names=""/></text:p>
                </text:list-item>
              </text:list>
            </table:table-cell>
          </table:table-row>
        </table:table>
        <draw:image xlink:href="media/image5.png" xlink:type="simple" xlink:show="embed" xlink:actuate="onLoad"/>
        <svg:title/>
        <svg:desc/>
      </draw:frame>
      <presentation:notes style:page-layout-name="pageLayout2" draw:style-name="a1194">
        <draw:frame draw:id="id2" presentation:style-name="a1165" draw:name="Kopfzeilenplatzhalter 1" svg:x="0in" svg:y="0in" svg:width="3.25in" svg:height="0.50174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3" presentation:style-name="a1170" draw:name="Datumsplatzhalter 2" svg:x="4.24826in" svg:y="0in" svg:width="3.25in" svg:height="0.50174in" presentation:class="date-time" presentation:placeholder="false">
          <draw:text-box>
            <text:p text:style-name="a1169" text:class-names="" text:cond-style-name=""><text:span text:style-name="a1166" text:class-names=""><text:date text:fixed="false" style:data-style-name="a1167">05.06.2026</text:date></text:span><text:span text:style-name="a116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171" draw:name="Folienbildplatzhalter 3">
          <svg:title/>
          <svg:desc/>
        </draw:page-thumbnail>
        <draw:frame draw:id="id5" presentation:style-name="a1186" draw:name="Notizenplatzhalter 4" svg:x="0.75in" svg:y="4.8125in" svg:width="6in" svg:height="3.9375in" presentation:class="notes" presentation:placeholder="false">
          <draw:text-box>
            <text:p text:style-name="a1173" text:class-names="" text:cond-style-name=""><text:span text:style-name="a1172" text:class-names="">Mastertextformat bearbeiten</text:span></text:p>
            <text:list text:style-name="a1176">
              <text:list-item>
                <text:list text:style-name="a1176">
                  <text:list-item>
                    <text:p text:style-name="a1175" text:class-names="" text:cond-style-name=""><text:span text:style-name="a1174" text:class-names="">Zweite Ebene</text:span></text:p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list text:style-name="a1179">
                      <text:list-item>
                        <text:p text:style-name="a1178" text:class-names="" text:cond-style-name=""><text:span text:style-name="a11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list text:style-name="a1182">
                      <text:list-item>
                        <text:list text:style-name="a1182">
                          <text:list-item>
                            <text:p text:style-name="a1181" text:class-names="" text:cond-style-name=""><text:span text:style-name="a11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list text:style-name="a1185">
                      <text:list-item>
                        <text:list text:style-name="a1185">
                          <text:list-item>
                            <text:list text:style-name="a1185">
                              <text:list-item>
                                <text:p text:style-name="a1184" text:class-names="" text:cond-style-name=""><text:span text:style-name="a11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89" draw:name="Fußzeilenplatzhalter 5" svg:x="0in" svg:y="9.49826in" svg:width="3.25in" svg:height="0.50174in" presentation:class="foot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7" presentation:style-name="a1193" draw:name="Foliennummernplatzhalter 6" svg:x="4.24826in" svg:y="9.49826in" svg:width="3.25in" svg:height="0.50174in" presentation:class="page-number" presentation:placeholder="false">
          <draw:text-box>
            <text:p text:style-name="a1192" text:class-names="" text:cond-style-name=""><text:span text:style-name="a1190" text:class-names=""><text:page-number style:num-format="1" text:fixed="false">‹#›</text:page-number></text:span><text:span text:style-name="a1191" text:class-names=""/></text:p>
          </draw:text-box>
          <svg:title/>
          <svg:desc/>
        </draw:frame>
      </presentation:notes>
    </style:master-page>
    <style:master-page style:name="Master1-Layout18-cust-Custom-Layout" style:page-layout-name="pageLayout1" draw:style-name="a1195">
      <draw:frame draw:id="id105" draw:layer="Master1-bg" draw:style-name="a1196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228">
        <draw:frame draw:id="id2" presentation:style-name="a1199" draw:name="Kopfzeilenplatzhalter 1" svg:x="0in" svg:y="0in" svg:width="3.25in" svg:height="0.50174in" presentation:class="header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3" presentation:style-name="a1204" draw:name="Datumsplatzhalter 2" svg:x="4.24826in" svg:y="0in" svg:width="3.25in" svg:height="0.50174in" presentation:class="date-time" presentation:placeholder="false">
          <draw:text-box>
            <text:p text:style-name="a1203" text:class-names="" text:cond-style-name=""><text:span text:style-name="a1200" text:class-names=""><text:date text:fixed="false" style:data-style-name="a1201">05.06.2026</text:date></text:span><text:span text:style-name="a120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205" draw:name="Folienbildplatzhalter 3">
          <svg:title/>
          <svg:desc/>
        </draw:page-thumbnail>
        <draw:frame draw:id="id5" presentation:style-name="a1220" draw:name="Notizenplatzhalter 4" svg:x="0.75in" svg:y="4.8125in" svg:width="6in" svg:height="3.9375in" presentation:class="notes" presentation:placeholder="false">
          <draw:text-box>
            <text:p text:style-name="a1207" text:class-names="" text:cond-style-name=""><text:span text:style-name="a1206" text:class-names="">Mastertextformat bearbeiten</text:span></text:p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Zweite Ebene</text:span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list text:style-name="a1213">
                      <text:list-item>
                        <text:p text:style-name="a1212" text:class-names="" text:cond-style-name=""><text:span text:style-name="a1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list text:style-name="a1216">
                      <text:list-item>
                        <text:list text:style-name="a1216">
                          <text:list-item>
                            <text:p text:style-name="a1215" text:class-names="" text:cond-style-name=""><text:span text:style-name="a1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list text:style-name="a1219">
                          <text:list-item>
                            <text:list text:style-name="a1219">
                              <text:list-item>
                                <text:p text:style-name="a1218" text:class-names="" text:cond-style-name=""><text:span text:style-name="a1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3" draw:name="Fußzeilenplatzhalter 5" svg:x="0in" svg:y="9.49826in" svg:width="3.25in" svg:height="0.50174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7" presentation:style-name="a1227" draw:name="Foliennummernplatzhalter 6" svg:x="4.24826in" svg:y="9.49826in" svg:width="3.25in" svg:height="0.50174in" presentation:class="page-number" presentation:placeholder="false">
          <draw:text-box>
            <text:p text:style-name="a1226" text:class-names="" text:cond-style-name=""><text:span text:style-name="a1224" text:class-names=""><text:page-number style:num-format="1" text:fixed="false">‹#›</text:page-number></text:span><text:span text:style-name="a1225" text:class-names=""/></text:p>
          </draw:text-box>
          <svg:title/>
          <svg:desc/>
        </draw:frame>
      </presentation:notes>
    </style:master-page>
    <style:master-page style:name="Master1-Layout19-cust-section-title" style:page-layout-name="pageLayout1" draw:style-name="a1229">
      <draw:frame draw:id="id106" draw:layer="Master1-bg" draw:style-name="a1230" draw:name="Google Shape;11;p39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custom-shape svg:x="2.19348in" svg:y="1.22917in" svg:width="4.67014in" svg:height="4.6684in" draw:id="id107" draw:style-name="a1233" draw:name="Google Shape;882;p36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0.05035in" svg:height="9.37008in" draw:id="id108" draw:style-name="a1236" draw:transform="translate(-0.02517in -4.68504in) rotate(1.5708) translate(8.65479in 4.41233in)" draw:name="Google Shape;883;p3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1240" draw:name="Title 8" svg:x="3.98306in" svg:y="3.86353in" svg:width="9.11461in" svg:height="0.52362in" presentation:class="title" presentation:placeholder="false">
        <draw:text-box>
          <text:p text:style-name="a1239" text:class-names="" text:cond-style-name=""><text:span text:style-name="a1237" text:class-names="">Click to edit Master title style</text:span><text:span text:style-name="a1238" text:class-names=""/></text:p>
        </draw:text-box>
        <svg:title/>
        <svg:desc/>
      </draw:frame>
      <presentation:notes style:page-layout-name="pageLayout2" draw:style-name="a1272">
        <draw:frame draw:id="id2" presentation:style-name="a1243" draw:name="Kopfzeilenplatzhalter 1" svg:x="0in" svg:y="0in" svg:width="3.25in" svg:height="0.50174in" presentation:class="head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3" presentation:style-name="a1248" draw:name="Datumsplatzhalter 2" svg:x="4.24826in" svg:y="0in" svg:width="3.25in" svg:height="0.50174in" presentation:class="date-time" presentation:placeholder="false">
          <draw:text-box>
            <text:p text:style-name="a1247" text:class-names="" text:cond-style-name=""><text:span text:style-name="a1244" text:class-names=""><text:date text:fixed="false" style:data-style-name="a1245">05.06.2026</text:date></text:span><text:span text:style-name="a1246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249" draw:name="Folienbildplatzhalter 3">
          <svg:title/>
          <svg:desc/>
        </draw:page-thumbnail>
        <draw:frame draw:id="id5" presentation:style-name="a1264" draw:name="Notizenplatzhalter 4" svg:x="0.75in" svg:y="4.8125in" svg:width="6in" svg:height="3.9375in" presentation:class="notes" presentation:placeholder="false">
          <draw:text-box>
            <text:p text:style-name="a1251" text:class-names="" text:cond-style-name=""><text:span text:style-name="a1250" text:class-names="">Mastertextformat bearbeiten</text:span></text:p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Zweite Ebene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list text:style-name="a1260">
                          <text:list-item>
                            <text:p text:style-name="a1259" text:class-names="" text:cond-style-name=""><text:span text:style-name="a12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list text:style-name="a1263">
                          <text:list-item>
                            <text:list text:style-name="a1263">
                              <text:list-item>
                                <text:p text:style-name="a1262" text:class-names="" text:cond-style-name=""><text:span text:style-name="a12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67" draw:name="Fußzeilenplatzhalter 5" svg:x="0in" svg:y="9.49826in" svg:width="3.25in" svg:height="0.50174in" presentation:class="footer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7" presentation:style-name="a1271" draw:name="Foliennummernplatzhalter 6" svg:x="4.24826in" svg:y="9.49826in" svg:width="3.25in" svg:height="0.50174in" presentation:class="page-number" presentation:placeholder="false">
          <draw:text-box>
            <text:p text:style-name="a1270" text:class-names="" text:cond-style-name=""><text:span text:style-name="a1268" text:class-names=""><text:page-number style:num-format="1" text:fixed="false">‹#›</text:page-number></text:span><text:span text:style-name="a1269" text:class-names=""/></text:p>
          </draw:text-box>
          <svg:title/>
          <svg:desc/>
        </draw:frame>
      </presentation:notes>
    </style:master-page>
    <style:handout-master style:page-layout-name="pageLayout3" draw:style-name="a1273">
      <draw:frame draw:id="id110" presentation:style-name="a1276" draw:name="Header Placeholder 1" svg:x="0in" svg:y="0in" svg:width="3.25in" svg:height="0.50174in" presentation:class="header" presentation:placeholder="false">
        <draw:text-box>
          <text:p text:style-name="a1275" text:class-names="" text:cond-style-name=""><text:span text:style-name="a1274" text:class-names=""/></text:p>
        </draw:text-box>
        <svg:title/>
        <svg:desc/>
      </draw:frame>
      <draw:frame draw:id="id111" presentation:style-name="a1281" draw:name="Date Placeholder 2" svg:x="4.24826in" svg:y="0in" svg:width="3.25in" svg:height="0.50174in" presentation:class="date-time" presentation:placeholder="false">
        <draw:text-box>
          <text:p text:style-name="a1280" text:class-names="" text:cond-style-name=""><text:span text:style-name="a1277" text:class-names=""><text:date text:fixed="false" style:data-style-name="a1278">6/5/2026</text:date></text:span><text:span text:style-name="a1279" text:class-names=""/></text:p>
        </draw:text-box>
        <svg:title/>
        <svg:desc/>
      </draw:frame>
      <draw:frame draw:id="id112" presentation:style-name="a1284" draw:name="Footer Placeholder 3" svg:x="0in" svg:y="9.49826in" svg:width="3.25in" svg:height="0.50174in" presentation:class="footer" presentation:placeholder="false">
        <draw:text-box>
          <text:p text:style-name="a1283" text:class-names="" text:cond-style-name=""><text:span text:style-name="a1282" text:class-names=""/></text:p>
        </draw:text-box>
        <svg:title/>
        <svg:desc/>
      </draw:frame>
      <draw:frame draw:id="id113" presentation:style-name="a1288" draw:name="Slide Number Placeholder 4" svg:x="4.24826in" svg:y="9.49826in" svg:width="3.25in" svg:height="0.50174in" presentation:class="page-number" presentation:placeholder="false">
        <draw:text-box>
          <text:p text:style-name="a1287" text:class-names="" text:cond-style-name=""><text:span text:style-name="a1285" text:class-names=""><text:page-number style:num-format="1" text:fixed="false">‹#›</text:page-number></text:span><text:span text:style-name="a128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rdjan Grujic</meta:initial-creator>
    <dc:creator>Srdjan Grujic</dc:creator>
    <meta:creation-date>2026-07-20T05:31:12Z</meta:creation-date>
    <dc:date>2026-07-20T06:37:52Z</dc:date>
    <meta:template xlink:href="RT-RK%20Consumer%20ppt%20template" xlink:type="simple"/>
    <meta:editing-cycles>1</meta:editing-cycles>
    <meta:editing-duration>PT4000S</meta:editing-duration>
    <meta:user-defined meta:name="ContentTypeId">0x01010012C7E5EA7347BF4983353C2E4B5954CE</meta:user-defined>
    <meta:user-defined meta:name="_dlc_DocIdItemGuid">3fb2c26b-4c3a-426c-9701-b1fffdefb908</meta:user-defined>
    <meta:user-defined meta:name="MediaServiceImageTags"/>
    <meta:document-statistic meta:paragraph-count="157" meta:word-count="994"/>
  </office:meta>
</office:document-meta>
</file>